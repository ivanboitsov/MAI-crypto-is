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96a05"/>
    </style:style>
    <style:style style:name="P2" style:family="paragraph" style:parent-style-name="Standard">
      <style:text-properties officeooo:paragraph-rsid="00196a05"/>
    </style:style>
    <style:style style:name="P3" style:family="paragraph" style:parent-style-name="Standard">
      <style:text-properties officeooo:rsid="0010a9bf" officeooo:paragraph-rsid="00196a05"/>
    </style:style>
    <style:style style:name="T1" style:family="text">
      <style:text-properties officeooo:rsid="0010a9b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я 2.</text:p>
      <text:p text:style-name="P2">Строку в которой записано своё ФИО подать на вход в качестве аргумента хеш-функции ГОСТ Р 34.11-2012 (Стрибог). Младшие 8 бит выхода интерпретировать как число, которое в дальнейшем будет номером варианта от 0 до 255. В отчёт включить снимок экрана с выбором номера варианта, а также <text:span text:style-name="T1">обязательно рас</text:span>писать <text:span text:style-name="T1">все </text:span>шаги решения задачи.</text:p>
      <text:p text:style-name="P2"/>
      <text:p text:style-name="P2">Задача: разложить каждое из чисел `a` и `b` на нетривиальные сомножители. Ниже представлены 256 вариантов.</text:p>
      <text:p text:style-name="P2"/>
      <text:p text:style-name="P2">a[ 0 ]= 431359146674431063018531827483305596853829004708542223688083067108621 , b[ 0 ]= 32317006071311007300714876688669951960444102669715484032130345427524655138867890893197201411522913463688717960921898019494119559150490921095088154424279114183479409772581068115661872646896829587805096241366737806145370452397344293584707356391147464926596456302481212245109913192490388322596822192832640753802216487732156229755206544940979107712104893768458604090623073778706659207945059518194906529139956917464177931106451696860839202660117083528757582549427148279196794994603005689132393468107545418236580402469425398715755728935683960760100951307321953285131245697639073190959004110355684447196218152032666234184233 ,</text:p>
      <text:p text:style-name="P2">a[ 1 ]= 431359146674423793989765062992391604652544732370235497914143335115569 , b[ 1 ]= 32317006071311007300714876688669951960444102669715484032130345427524655138867890893197201411522913463688717960921898019494119559150490921095088153880652737310846523571215746813749422616683947007574255821988684183694088190944990559087618492055190472027391733220522790045657509350491183546965965788433994334445875764229080632532245787337231770828966039705256478300969866755457378650490896283179309824622141258241090311686508772523757210838074463559384684060766171434938869097993177810791471449778694892321245124620802472814196530041616582507298442921790969319027503710472504601989297137395803660252624749924881871974223 ,</text:p>
      <text:p text:style-name="P2">a[ 2 ]= 431359146674413742315088614446399537004606882191030870492657113929623 , b[ 2 ]= 32317006071311007300714876688669951960444102669715484032130345427524655138867890893197201411522913463688717960921898019494119559150490921095088154182027862932740947217468518531289957827667693850669515294401118062496282481374133935019139531684320007391969273775413899179434198610173742129952254154578405329151008855281551565656570155049859636788119086224170104554894900214118040567363152679747978878779168422581008572568826676243042320680930129127908113792797962661449149584171549200762900362906987286912152589039168073790007176506603775961915382559710141270399534278582299351248520723318774294932998448263390542638563 ,</text:p>
      <text:p text:style-name="P2">a[ 3 ]= 431359146674412399944377528035704997694797283600165103824882760531947 , b[ 3 ]= 32317006071311007300714876688669951960444102669715484032130345427524655138867890893197201411522913463688717960921898019494119559150490921095088153027993098581633485983922541269192248700006724257331691057758085480670991374717135830971566224265327995623012838302917216156250006251936884389839017787470827848344142829683337936284690554341838035316412759336392923633231150314670343510817597954549847578253568662010955710994135280079134514160944112084808312647848621546475190260693676502381570805651559851937222566298768933458378017084325693845805661112574347716632767502722869892847563253292313010957541733359656829002263 ,</text:p>
      <text:p text:style-name="P2">a[ 4 ]= 431359146674421139339565476586295434659899788075798170926049284869573 , b[ 4 ]= 32317006071311007300714876688669951960444102669715484032130345427524655138867890<text:soft-page-break/>893197201411522913463688717960921898019494119559150490921095088153346995740438449089416649834690228499608194838145528505519131631438622023376121591347793156282990495339598965336508531356417455211421497042517741624569317945018860895321422562865991808530363611921293216403052157061013067115439538195035247916933815883596418530794536980847834225254007763202897476509767073764314719167931529569508316483772059024219859324809932580821396454364501315020582768261322676774890734712672152263491603159994785412460934530010574060514636147370274369 ,</text:p>
      <text:p text:style-name="P2">a[ 5 ]= 431359146674412375083503926218380907589357734542502360349761428715963 , b[ 5 ]= 32317006071311007300714876688669951960444102669715484032130345427524655138867890893197201411522913463688717960921898019494119559150490921095088153132092752054780646499168822639365582793890509104780980079559568732521253001730386785958465336074198376739508043965215341804570958901032444485365974673896127905396456293544697860722483994946245440316605084958027677914778932633860571927897876636525440741758497788691872836721841014929677919483020738467095312551704998388866083320165695309759427511979068995818974117299464174729899363088642141873193778718350957002414833699651887243424930641130688025003446762475702588854393 ,</text:p>
      <text:p text:style-name="P2">a[ 6 ]= 431359146674418402312830884399521275862238185086919292980039923230643 , b[ 6 ]= 32317006071311007300714876688669951960444102669715484032130345427524655138867890893197201411522913463688717960921898019494119559150490921095088153747131214727874617556186922113201295716652404169969747413805207300137433641768955963015024641706095145633963683250427730097518330138184399874448782888015915188911964928644932578643488045934022475620410942799109041659510751451725680658714462950582292566081045859381482511764860551744595043584029664049756676173998683853823747914312374040455680491409619279333240216364557151969366620991852120241363390183903033006405862711501421484260300288981119150384083490444215320329947 ,</text:p>
      <text:p text:style-name="P2">a[ 7 ]= 431359146674421564807811663003759817650350639768018700584416396571403 , b[ 7 ]= 32317006071311007300714876688669951960444102669715484032130345427524655138867890893197201411522913463688717960921898019494119559150490921095088153859805410041047736243351653502323995568374186021390948138731652922960004523926551296190153581675402657665198068031008079498372559444324296513555639802083372622037112534556061342689852481805906754831000677399412722526757635819660046131757058636199559344587804261199153760118759979608175553435359321097603842772688802411323276244640498716396277508234190152590626996093451890027361279001781187284629457215239299520010676848777097729149791286509368069890149367809171690117023 ,</text:p>
      <text:p text:style-name="P2">a[ 8 ]= 431359146674417933599527672105471585385717464362479097466603152917943 , b[ 8 ]= 32317006071311007300714876688669951960444102669715484032130345427524655138867890893197201411522913463688717960921898019494119559150490921095088152587103025343483562792659752821352125395362933396528123727246039398373411071357178223460520571382355023077067468314265675680950360418483489842465906135930846838388200338460514824361976229045764081408252732638938604690306823678312997166960850080862455147983037672625057000412983817697944098393558161944295756635287146339267120746638894525301993026969808438573108472103479163159139477961366285737792105298352031501416758512580456571899284949154363249274194872076530571498651 ,</text:p>
      <text:p text:style-name="P2">a[ 9 ]= 431359146674420458260848631026400404507982328088836034145824776446079 , b[ 9 ]= 323170060713110073007148766886699519604441026697154840321303454275246551388678908931972014115229134636887179609218980194941195591504909210950881539570048837665284646108580801357912287559801660330457654184933938245252629869829694351848134826<text:soft-page-break/>80389558802463395252303328128125469189367098585276037836712648167044379085982528495909695030081601422275311180111455197630737233947833293737848124261093855693104076713052007405746427759265741906753290321521176615396033312985820790424157856807093882126369418849156458707301945592993767420342959414942532142629447425113836549185719816564883564355277885662733609427096945975211517 ,</text:p>
      <text:p text:style-name="P2">a[ 10 ]= 431359146674413114993644696674941779236041104140656490193849723062209 , b[ 10 ]= 32317006071311007300714876688669951960444102669715484032130345427524655138867890893197201411522913463688717960921898019494119559150490921095088153253366590201593678991629477381772827266622154499258198912350436382172958729508363535853591955644996921446676763316127082639819264074633848364048965165261637241814692633221915709468182350645041328875226898023233042125804737810303292952028720211273925411214572717735236926958767471328198297763083850604063167876341902601448006918496038115264081165343799695043832443569422656296919498759644517982738651363677120868861793766951606446589332051615023328280965641378737497465667 ,</text:p>
      <text:p text:style-name="P2">a[ 11 ]= 431359146674430563588026608734670641595618918917504366009712762974833 , b[ 11 ]= 32317006071311007300714876688669951960444102669715484032130345427524655138867890893197201411522913463688717960921898019494119559150490921095088153739108137909253630114340071293011572057964016628568321668617630420053020886276466606320677452551274146805923601164614996512419247311386477025871980494325239708444174867365643300711123365401643622447077733017015623976069576551194968451402254552154253776422926816089998730376224585579860316970824667335042109914626376853683593931966122864947884564685132558827276842860977194262202389470059932032476484180032188133430511371741281348236303772057626951547653141541331682259867 ,</text:p>
      <text:p text:style-name="P2">a[ 12 ]= 431359146674414823741852847832532773485531362368543725931301235416599 , b[ 12 ]= 32317006071311007300714876688669951960444102669715484032130345427524655138867890893197201411522913463688717960921898019494119559150490921095088154121536247133678938499808154909564146479284663782790063790749450887725439594079865824220711343492207984296296259526435081242441543968522715458273227058257658120030216766394224536333802803985651204035327136414061709793734196023594600908012501153642383282213059276182005781500578619793579156595275172440058189538293611011143792573314563761495793513021160487139641224224503771407929803168466774722474908957055279699452344751476735328291544866668253224995336974508152972570853 ,</text:p>
      <text:p text:style-name="P2">a[ 13 ]= 431359146674423660344300682757638333867196567153856249507853345860679 , b[ 13 ]= 32317006071311007300714876688669951960444102669715484032130345427524655138867890893197201411522913463688717960921898019494119559150490921095088153407711332109470308166571417067452886017206111566380062222899445056722966241272136179210558527962758387013564663915395411311355193298485611896810127982925454571693511654658588037701176035236242989721979548112764081565259995396561561662246158396855453871124096961592075587070514492523415384900869027347466222783806782087572599797478702090240427720492725924922283143598494958876301688504819665988169469486148885426243703286748173979637960800494655158446069719829831881563339 ,</text:p>
      <text:p text:style-name="P2">a[ 14 ]= 431359146674419793691025921125551784827099320182969701575998218974327 , b[ 14 ]= 3231700607131100730071487668866995196044410266971548403213034542752465513886789089319720141152291346368871796092189801949411955915049092109508815438984358311816534743768408719448685599424998137771702461552890044177980441307314991642565688822552128989731979463900450984211652742069151747333720383808411600212444731132172204976123569325054294220393183035038316588274419284328812788084758705153976111020<text:soft-page-break/>7414303517063724983573238291191407297916811461992799037811962379037417878117507069125479528963515636022499210782385918676966335244701822760125717120364036204798069047909264506086478982215625705644797070636371336958579 ,</text:p>
      <text:p text:style-name="P2">a[ 15 ]= 431359146674428462550399754141106950556133557524279088839634495870333 , b[ 15 ]= 32317006071311007300714876688669951960444102669715484032130345427524655138867890893197201411522913463688717960921898019494119559150490921095088153774483782412939118158021663734968660290582871864898633921665892717305521788102344720262296505349681360353832492730756694526860914476760575830286096759644706423626232544241807820124240517198936444726208278389311532743573611070338893805955827529138847083007287447154981208200347572696839610875904311527474158738951699820769969610054893881756028738129938779475290195095846767659830995497875782479425495849408346771713106752261486142880231910217334618564751554499508428027847 ,</text:p>
      <text:p text:style-name="P2">a[ 16 ]= 431359146674419858387318900852631264953390055438420974858394682559487 , b[ 16 ]= 32317006071311007300714876688669951960444102669715484032130345427524655138867890893197201411522913463688717960921898019494119559150490921095088153559393025870588672959825083440262925750254464935949643421405008606311489732391355505489082496885373925533493214396626942564992603948813892954478664073240222183264129486799435446594822516347626739561771338793693363687158479827638786618780526252262608358857994607218025289699272100295605766553312951266077252101444073608385164086597715758074882952619907337757328876558319849678062040578919472229536878363863722358993660846932663716605003825402255107104756505967909135298247 ,</text:p>
      <text:p text:style-name="P2">a[ 17 ]= 431359146674430006272237087556463121507570669992229769273664163085559 , b[ 17 ]= 32317006071311007300714876688669951960444102669715484032130345427524655138867890893197201411522913463688717960921898019494119559150490921095088154771160408156909006064056953729363652080556056291600415063880537293991029939453581901444406452461666801806160745511956056412675705280086425190177910455497541197558457279375047449002446971682291797640172888701764047711573325618517413299644223274835424070703443870905637679484148064158899405083395970093005331975308696610403258154624270877981739609338693771936310719912302819311223372215179968118523227014041895819420079003807625606573811414484526456084576970699745974019271 ,</text:p>
      <text:p text:style-name="P2">a[ 18 ]= 431359146674418053960581575968649599736090715636066874741704836834949 , b[ 18 ]= 32317006071311007300714876688669951960444102669715484032130345427524655138867890893197201411522913463688717960921898019494119559150490921095088154410511645811524309887805122913455533208726018340677619628717507231158448626849340408076559269022349349161844121285144455921308997926477508276286239828073349240605880504091572345136526852518818314344931482230926839927992678778249663745414343492700482784853003760049808005953307579881058050079933174772833534009415823276243508496972633605285594280209399779181691411085260143076640642727950595135612686896586658929237062955048483384025691753765807537589978428163209933974241 ,</text:p>
      <text:p text:style-name="P2">a[ 19 ]= 431359146674410729672985967110295358847809300107367827498692735194409 , b[ 19 ]= 323170060713110073007148766886699519604441026697154840321303454275246551388678908931972014115229134636887179609218980194941195591504909210950881532233123997296904698025588262609725665360930379664369074864687456007181861832353862431043694518804508135010347696622019891639532110412055554200862108800255923312703345940457520185508510795253148740416404669520580390519833171133991308469564652630409163966408794902068070929955089453750000196615655965014132146620785424847390556834244831<text:soft-page-break/>60464535849175154681885946979569600077395079862280783908173638259736274343837205886300918160165546359786293590229293971467253695427275647 ,</text:p>
      <text:p text:style-name="P2">a[ 20 ]= 431359146674431646158918264520067909458740716426204965044971341756369 , b[ 20 ]= 32317006071311007300714876688669951960444102669715484032130345427524655138867890893197201411522913463688717960921898019494119559150490921095088153853245132551825708111253366809400007518299244575421777452612651946683983957331994567556268740971137117609507734610936028914988874582621203512736295773839705151340279807240765360669077278105145462359547612983054873733711829341524771887184090391076735142823139548113181521578030356977012191185844908141626778950139737522140706754714335824058192130473399715850095556594482224461194988401036414473836545593503015525513689023336974890987600842301847179071298139391147496127157 ,</text:p>
      <text:p text:style-name="P2">a[ 21 ]= 431359146674431324215683839175445830255536553601590679322224135068849 , b[ 21 ]= 32317006071311007300714876688669951960444102669715484032130345427524655138867890893197201411522913463688717960921898019494119559150490921095088154250514239200032475086125093763317872200540620188473526589439788654992599480324470898510454498168039927924236174003937578421278128403955808479806340631208087198134295159137112539771095038795070000456040664375593884889460125686033529203688060228371188245430602274117005796664919645879391769830808324692179055909932440748326370490686527514771285071136383992180381261603850157013968048948575074928823643572918931952990612916449089826986654851341155730043295614716594893380033 ,</text:p>
      <text:p text:style-name="P2">a[ 22 ]= 431359146674420030922108708456213239794175605873237566936705172754963 , b[ 22 ]= 32317006071311007300714876688669951960444102669715484032130345427524655138867890893197201411522913463688717960921898019494119559150490921095088153011222366463860217967580239295174993707262767350704398337580991648958524447701395606610534182348632057901305359806996320538743792255843613500866347822121703774786702293893212731850267768141778587262891739976417111351914116791189070130303336806596704312531547228590231087710601585578326356075094204260039262918698708560023519768073910304834569629139218248422690572967657000293990317156086037953597881915367935353759621384398568967775450433480596830343693452396363914199419 ,</text:p>
      <text:p text:style-name="P2">a[ 23 ]= 431359146674414994272056144058281623861409332601368928397826975991999 , b[ 23 ]= 32317006071311007300714876688669951960444102669715484032130345427524655138867890893197201411522913463688717960921898019494119559150490921095088152805191357294324642485513640812678548668958013444911778509109577933000794221091747121533039493737666943177156151038556671245224614372440607459288498136273741410933973644571487882176678277971086712919799924575196586610072663707812727418221367606589258554770003943654799787445243310501740331090763687047573689817386933966813208807801871963397319471305342363033079629548746726589959112633980338964031922894413974496395515176303953035261220079298487919132103782035399643295499 ,</text:p>
      <text:p text:style-name="P2">a[ 24 ]= 431359146674430570494215580163352609417274811381382536229099133995543 , b[ 24 ]= 32317006071311007300714876688669951960444102669715484032130345427524655138867890893197201411522913463688717960921898019494119559150490921095088153642384855148085128629163886816697716719761401407350646480842312357905650934532491474863004665249030960624367866004837105660575588114342322100665879080035617166677006084120767553397895607567677782804923543189368036153949140460092785063772818412650424619503482813603295375823746079885151429279641369121600984974583890415521401676433702335958093508481424027916673719143922156075324692471314707509752704258916880210744514856933184032096818396605237064740263830823289302835983 ,</text:p>
      <text:p text:style-name="P2"><text:soft-page-break/>a[ 25 ]= 431359146674426758920918400030337064452745258279526315054523360160589 , b[ 25 ]= 32317006071311007300714876688669951960444102669715484032130345427524655138867890893197201411522913463688717960921898019494119559150490921095088152744699505284644795506659596339525346545791917991894028327940677510076122938573103014020945735213192400168616118810482326283762749213925658881693624017880180905897338944776901453581883390263242347380039643901860727842546314977395213108157988864545697206423325011322945450910587565663459568497124374531654922550283334619782458716825494580644776334038671656781634284245857541283884869588329816073926111468709793074643850946625841321739133627287787770517067489049229944509191 ,</text:p>
      <text:p text:style-name="P2">a[ 26 ]= 431359146674420028507296956250062302484942031071357001552137869909019 , b[ 26 ]= 32317006071311007300714876688669951960444102669715484032130345427524655138867890893197201411522913463688717960921898019494119559150490921095088154142793091305436463106537187192586996152006415235985839918220393656946788622444535634518255137637882107188409197004605225579193894244220823501012540230476898227270523652854860715115201526119346142191387910190033930971372331215341640624642047395441084364516455146319281902798930194718218178320010966948293785773099879641433405607470136304298327846313699171553423636048361633853700607593454055713845691430125213061284625962629265700681939550402977079019950264142406688841521 ,</text:p>
      <text:p text:style-name="P2">a[ 27 ]= 431359146674424787475509494165100354148323839727153172776251366630271 , b[ 27 ]= 32317006071311007300714876688669951960444102669715484032130345427524655138867890893197201411522913463688717960921898019494119559150490921095088154713508680306743604047043809415658945099544764378688524979255671882447810877110174524951110297713408470729154990465510227028857459020859109495977880652221414061373832472067296418510009563590565732162632602109161279849955196654077762021439605129278399146688921060711525762015208622262764653970798780451935947049915400497594869253828938708178991311606780211157441676965995157991339399430537225184319222293655594846798367470103780009358664995500426331680226630560839142080521 ,</text:p>
      <text:p text:style-name="P2">a[ 28 ]= 431359146674430765967638961084788611203865107845871488382497342734993 , b[ 28 ]= 32317006071311007300714876688669951960444102669715484032130345427524655138867890893197201411522913463688717960921898019494119559150490921095088152683973057566452724425959049117107408610016088503053724241135939915599230154130828700987729931292349866146332618160289151816298235010864597010329457467375211304034568330660301441860148282911670041476731986514962912548814016574627844166770733313908190747843408682619244989422255179155618981596165136036751556505420426690458931624135535242806477582778213943827416319013869498601243036544096796372894445100113470815548093637340466352393717677693612342601581605234611437272899 ,</text:p>
      <text:p text:style-name="P2">a[ 29 ]= 431359146674415075583841535117230246027501850497314921489544621489153 , b[ 29 ]= 32317006071311007300714876688669951960444102669715484032130345427524655138867890893197201411522913463688717960921898019494119559150490921095088152453659852376261151862955313391199554873885711062041337884115460111636611778952226782228875998826893087373999483940897161216445436932489415085260185475297145213674492667686305880029617529867346941028193176958015096527639967699038346073836568598056404495352161269002922026318359257805566187267467143528604596252757796458208593675655347285497603144144679631145342269340341143469602171816506130380991362533407160923006783668002150656141866999560341143783887591265615365301023 ,</text:p>
      <text:p text:style-name="P2">a[ 30 ]= 431359146674415435468891607578590031144299388559442422383016602327077 , b[ 30 ]= <text:soft-page-break/>32317006071311007300714876688669951960444102669715484032130345427524655138867890893197201411522913463688717960921898019494119559150490921095088152700393286871727989725335207694509238221088594633751250765384212522480905481776072087513864967173403756018080703961175875553563072054735462649601696251251234709326694653064229469358853480905096081210245480682986062812995359258144346553985338469339867764311377761107254932766266117278084896477228760125653120551801044255082151505560118547109318670178270354800172852442585783680290737913674411233493844803619623610514772322402915509904837665799165441850071755761472760031517 ,</text:p>
      <text:p text:style-name="P2">a[ 31 ]= 431359146674411430603873287576010406259942711847172426257419067368627 , b[ 31 ]= 32317006071311007300714876688669951960444102669715484032130345427524655138867890893197201411522913463688717960921898019494119559150490921095088153253366590201593678991629477381772827266622154499258198912350436382172958729508363535853591955644996921446676763316127082639819264074633848364048965165261637241814692633221915709468182350645041328875226898023233042125804737810303292952028720211273925411214572717735236926958767471328198297763083850604063167883881620673694188614083090642637760508983217974670366150246235381032172493743234687821162195391352709890352762991491085949484666893791371154085058443442139070680843 ,</text:p>
      <text:p text:style-name="P2">a[ 32 ]= 431359146674414016651734080783522684361143711073050245533882687025689 , b[ 32 ]= 32317006071311007300714876688669951960444102669715484032130345427524655138867890893197201411522913463688717960921898019494119559150490921095088153957004883766528464610858080135791228755980166033045765418493393824525262986982969435184813482680389558802463395252303328128125469189367098585276037836712648167044379085982528495909695030081601422275311180111455197630737233947833293737848124261093855693104076713052007405746427759265741906753290321521176615398703044058404245694095881670037634441476249320049479478625889720062637890648093115392456100457097561743386344312627598903803022641629250476562404163521565125979557 ,</text:p>
      <text:p text:style-name="P2">a[ 33 ]= 431359146674431184250183987934035843275900107596586771855565474445371 , b[ 33 ]= 32317006071311007300714876688669951960444102669715484032130345427524655138867890893197201411522913463688717960921898019494119559150490921095088153210944787788417713382513264020982139311791086411664832211612284375569506415061286636874411226642668921767720882227946806484837454583303253679834830407147529138596854503224549668724096660752029306693786056266772098246764193445604252646020514727545200689249427705339935870794655104728966073919526678706371908341647372471817551752154935378956876813525235606067148793032537123306940727723245145366651729777872819468477074529979709698148223204308945967178219260142238327137281 ,</text:p>
      <text:p text:style-name="P2">a[ 34 ]= 431359146674425508278571593197602152523675066854665544530795079617811 , b[ 34 ]= 32317006071311007300714876688669951960444102669715484032130345427524655138867890893197201411522913463688717960921898019494119559150490921095088152778222405293879185746346956229460226455982182862952936071991492956350176180174543394491456526190909496337523193404428718105899060870541521890620047989345694306646711963217234584969544399099239260576570618248568191415096767266560178646845439556837573327520954702094776297658552750882696867235196551530313135247059412685304703875265801777335592066801325832820012778782916367393698046747749908707915363246857115206799419266634117292820126503103035835156837493900325795078123 ,</text:p>
      <text:p text:style-name="P2">a[ 35 ]= 431359146674419962503371058447324027018381950318189962974662270917947 , b[ 35 ]= 3231700607131100730071487668866995196044410266971548403213034542752465513886789089319720141152291346368871796092189801949411955915049092109508815456719023057426<text:soft-page-break/>5474971421886425721051778675819585360846962955353894484329174199274703758183473972627203620558212606273336540807621088054981286199029691974118505347844766504648456259224782823685111609782073756268933445897948827724650253746396832545790220062822946211721512396055284688227971095719933837980484754561836352673521163265495122546323457246763687506179053798279856633353728287621520737896403250043092525653584677422811984971505180463830502232032155695339548035329 ,</text:p>
      <text:p text:style-name="P2">a[ 36 ]= 431359146674420511380267437972231734528929293769392721728945499689387 , b[ 36 ]= 32317006071311007300714876688669951960444102669715484032130345427524655138867890893197201411522913463688717960921898019494119559150490921095088153705327633349079627595715622860690810048642158879541970472201298344303829195691260666975457530537060334233185776225632418290575351977744924051006104165165911876045874468065559591800860251206116581291084214401956699747043350326120590978292008649800870642058190580834068156405931806041544873953813577268162814537174815307472774570938794883428667126916709436824576759558568305836669940046905536832420947512700649926803053918572380567561783629967534230094107057370221807240061 ,</text:p>
      <text:p text:style-name="P2">a[ 37 ]= 431359146674427293955019333870931419346602903995231384494959085394113 , b[ 37 ]= 32317006071311007300714876688669951960444102669715484032130345427524655138867890893197201411522913463688717960921898019494119559150490921095088153418222704603272931285369305586342363863615750220671211739778987902086553726003989937328438318094894509595864733666348000191223193743010425152002610223117122826689697027701855642926556677035252009812702961734912364836442020682883518378607267636331408106479570973485848842212647794906548990204703376410980403479028809584539688426351893569843478484999800654874226732562626575025143904463506415380442234587809567761334414644780850584260482673121939131298153062278190361722569 ,</text:p>
      <text:p text:style-name="P2">a[ 38 ]= 431359146674413824212844818222707047933613718819841295318203131228729 , b[ 38 ]= 32317006071311007300714876688669951960444102669715484032130345427524655138867890893197201411522913463688717960921898019494119559150490921095088153859805410041047736243351653502323995568374186021390948138731652922960004523926551296190153581675402657665198068031008079498372559444324296513555639802083372622037112534556061342689852481805906754831000677399412722526757635819660046131757058636199559344587804261199153760118759979608175553435359321097603842772270558687628713813127308398493194419488061461049703412188221249962323935533577699801298764679500390986703860083169808026403656808410428665225160351432073560892029 ,</text:p>
      <text:p text:style-name="P2">a[ 39 ]= 431359146674426775132442624418711321770755913345993406105620807363111 , b[ 39 ]= 32317006071311007300714876688669951960444102669715484032130345427524655138867890893197201411522913463688717960921898019494119559150490921095088154172125128071109861721743349577055113691165939510790123477385212199947219401622692770315013077329626265194385305793113463940568488526632358981231148768410988144492385223418895672438958778874156042906794648081816169277737011119759005790528576148021859797697152829545145030737622208695491058695071571584555414372587466723354236488107157257102862490739105804796161984327576703183232720523964252869160876287855269194249719326185409441973682535156437624088145436760425178650801 ,</text:p>
      <text:p text:style-name="P2">a[ 40 ]= 431359146674416658373079136024952323476166607719585632997540818294451 , b[ 40 ]= 32317006071311007300714876688669951960444102669715484032130345427524655138867890893197201411522913463688717960921898019494119559150490921095088152657908493353586869850549041566336606305230681901216071429591226768406521730657135003688398370151054374677220252815010872281455266158081040524522805627311589101367725977655464<text:soft-page-break/>034990608172187783370716249957502172625644569565856794827454850469094562194501188979834741114190692985094011922882759557759546827745075713509352097014016871335794388805671454549212256038834298653794808300419506471636905067867901660372203019790760618555186872116204912685588305610334116592429237117 ,</text:p>
      <text:p text:style-name="P2">a[ 41 ]= 431359146674414876779701594644833084371229085908370350002735421929169 , b[ 41 ]= 32317006071311007300714876688669951960444102669715484032130345427524655138867890893197201411522913463688717960921898019494119559150490921095088152567065543766630827046297870048619363662478732444908583966134248073364941365854452101562262876422442622633395281004999087638348879717855878446578770356607622282671177149113006557040767535438156707849710058062912057352886840172004746712213162815811162548124246748549002738123317036370143643997778564222379225498421767235195669556421555123979476848810809294332746943253388858144847031071142672920064108178579700566496597151476505371060589501831911215780564904478634182448563 ,</text:p>
      <text:p text:style-name="P2">a[ 42 ]= 431359146674413969025095146188890428109042971283465813612160492281361 , b[ 42 ]= 32317006071311007300714876688669951960444102669715484032130345427524655138867890893197201411522913463688717960921898019494119559150490921095088154601080968362972283994452457910901912705637599006988746297873169348470131346331540170682803330479366380428604203422346046773619616199804742885099066301521643025655797892668011413199154844570699398471996446441173152237438332068264436662528749813541272251698769282008800865557054398656992905583716018199762499139122148527414650489874466109293956930919489153294074255018355633671628988609570012647282501853953798986115675770264794734196217596295976919529138117380047940966739 ,</text:p>
      <text:p text:style-name="P2">a[ 43 ]= 431359146674421652364045487263657520702606699266495847880449913387507 , b[ 43 ]= 32317006071311007300714876688669951960444102669715484032130345427524655138867890893197201411522913463688717960921898019494119559150490921095088154224739765728996274466881057566549001612500635657399129225947017837451551044958417083624449996018159962916318521475629293814673552884238140408243081592689071287868693552380211255203617634276887968907665703861560771680427745931582762612987911794718356180395520529936986253691067196937259454973274023012434145111689765761819851560618370966925589017513036866307105578610131760744646538361942231146470514753263640622696635591239896896628670034374083307215779807764750247444417 ,</text:p>
      <text:p text:style-name="P2">a[ 44 ]= 431359146674415019150970156711409046870548998745113669842328731540307 , b[ 44 ]= 32317006071311007300714876688669951960444102669715484032130345427524655138867890893197201411522913463688717960921898019494119559150490921095088153883690164825003870418692638158334183495493508676770454124713119474423344250681149116506786057734785816892276599512372235919225969978829014128926172683514190734716706510251017108283889946287535643091733256256129861381152890058671596356251947106706667771953088573147830779621618505382545861774049233108309082186674993532648710722588131809108505364539158191500766248675610832449415363943208367118980075258562402720414768667969164036664552846221728257758638106879991519733253 ,</text:p>
      <text:p text:style-name="P2">a[ 45 ]= 431359146674413973263632582153175253777621260399965772473014700296477 , b[ 45 ]= 323170060713110073007148766886699519604441026697154840321303454275246551388678908931972014115229134636887179609218980194941195591504909210950881526062250895430911057301396159480481816546760246293238743901430370209452085415924702241702651268664902526269591217801812466091599980499006064261961826593570583076797451432175968843170400557168593628415268846957303570724117960065559441167279782080373314187993781986444362037443976544766285064179656305445589565003354952180517559621296978<text:soft-page-break/>73127989077169664805568687916300451634594013697758449083704911367775019575897550678900470660298838101212650745823079185415629050745148531 ,</text:p>
      <text:p text:style-name="P2">a[ 46 ]= 431359146674415220954248472765318768829205123614774441649519607896391 , b[ 46 ]= 32317006071311007300714876688669951960444102669715484032130345427524655138867890893197201411522913463688717960921898019494119559150490921095088152856714176449689219730741504742206942920054015416252841967862380690659423701698999604609795616376103242014639671468688414486533336811825806254172345608523037234243402345486393633875117809282823108560052839915653529058713067987614574745275103037491364018499591110462688334047444717214752227881848441669652712565332737901343313061667542332913135990254603189451002007855654138953628006047874337109040516060023207605490689322388076403276591956374010627189536024482568212559619 ,</text:p>
      <text:p text:style-name="P2">a[ 47 ]= 431359146674418942498177026717549328839065543524171471221827853637427 , b[ 47 ]= 32317006071311007300714876688669951960444102669715484032130345427524655138867890893197201411522913463688717960921898019494119559150490921095088153134183852345129965215847742922557931098944976371341733768956973848112863965409337937943739415928863944969728309434927662790348028824823713709609911996122599925111546999111978167225522777592820872902247911744472404635228316395727717549698635493722578269903862717757364581808777436931219062145670530535643493394719729290724825876567121549913862496767508081690472027061780995925292666206869673962844978726394227879808211121059760680653087732891506273494247113655976419430347 ,</text:p>
      <text:p text:style-name="P2">a[ 48 ]= 431359146674432252359562614256315326234252808422625540856512634718583 , b[ 48 ]= 32317006071311007300714876688669951960444102669715484032130345427524655138867890893197201411522913463688717960921898019494119559150490921095088153623457891277562281753534052648560016318003866650416611664424172271695951658602206392428218527956240749718434409476761733391914685962856784623591942910301236560772852067906591765636677965411551312681491976776289003478586327694972067984321932804686770921405925476856727358542372334376382262380598167329546244613194043064543847869257176542575724643457863880798155543302771452745902397369933573771160690134942624225092811991007729998901499601049039669833725005644579546835187 ,</text:p>
      <text:p text:style-name="P2">a[ 49 ]= 431359146674416414719884122705303901635930973193853659828713957807563 , b[ 49 ]= 32317006071311007300714876688669951960444102669715484032130345427524655138867890893197201411522913463688717960921898019494119559150490921095088153774483782412939118158021663734968660290582871864898633921665892717305521788102344720262296505349681360353832492730756694526860914476760575830286096759644706423626232544241807820124240517198936444726208278389311532743573611070338893805955827529138847083007287447154981208200347572696839610875904311527474158731644144485841013795234350189350482744640735928962834228842285838420604880915855754435251084609150196049547751887767807615710462180824653881309291132989471895720191 ,</text:p>
      <text:p text:style-name="P2">a[ 50 ]= 431359146674428833154559554048974644930963717203993018160160720933907 , b[ 50 ]= 32317006071311007300714876688669951960444102669715484032130345427524655138867890893197201411522913463688717960921898019494119559150490921095088153027993098581633485983922541269192248700006724257331691057758085480670991374717135830971566224265327995623012838302917216156250006251936884389839017787470827848344142829683337936284690554341838035316412759336392923633231150314670343510817597954549847578253568662010955710994135280079134514160944112084808312657372866302797678254441869493196742479166203164678032893002955259955596865671352614857424546788744850057792631925436460857079468358689199250959470961367427913627397 ,</text:p>
      <text:p text:style-name="P2"><text:soft-page-break/>a[ 51 ]= 431359146674411256455174625023612293263799260346789451881496923123139 , b[ 51 ]= 32317006071311007300714876688669951960444102669715484032130345427524655138867890893197201411522913463688717960921898019494119559150490921095088152587103025343483562792659752821352125395362933396528123727246039398373411071357178223460520571382355023077067468314265675680950360418483489842465906135930846838388200338460514824361976229045764081408252732638938604690306823678312997166960850080862455147983037672625057000412983817697944098393558161944295756638369325047439487702904740651734304029188627290997737300414611056469417922918614919901351119817637909647710391153056376185669206740096125461152694800206348764693521 ,</text:p>
      <text:p text:style-name="P2">a[ 52 ]= 431359146674414616318826704684301786737291523120613456834733196023181 , b[ 52 ]= 32317006071311007300714876688669951960444102669715484032130345427524655138867890893197201411522913463688717960921898019494119559150490921095088153733394988825597268095824152382442295286013159475522142821343500833006875682530765030593949234419776449364948971141623844091777687521050660077946456646805663896747791420309413320188287230805830669852048803191724098420466933248278844609840585424964522644036394388310191487995149668395974216110919431247183068089805876784845798370271487833321891226020178198748937720161905064740573457082145986796515705369659374852781986031081132165834129535959313090821075561371529980347229 ,</text:p>
      <text:p text:style-name="P2">a[ 53 ]= 431359146674411492539846393646680181056279859812254104070272562893129 , b[ 53 ]= 32317006071311007300714876688669951960444102669715484032130345427524655138867890893197201411522913463688717960921898019494119559150490921095088152503561138667039458276281081034255612862148328125013434992218944206114167479880876845661906509667160545992497173753094061012729294074224263256937375749168898171766729504958902025013962959824118943123847606843880657808171872747626590159198374765340310174645397958729060476646687723699580522329374197929683610284124956797427960856073958935274109584470162823363734921599238012701760399152864550699942033874905772125968069594574577327806202404519738558186918109020839362041239 ,</text:p>
      <text:p text:style-name="P2">a[ 54 ]= 431359146674425825626114119955200005434566418649964416137149792973163 , b[ 54 ]= 32317006071311007300714876688669951960444102669715484032130345427524655138867890893197201411522913463688717960921898019494119559150490921095088152590763904269988303929498777127252170002618337105237953934129168234707286608002472596764753669397556497147899992492329612872947313822556424344762753126458871010004436566846902480752830880270255450377432817377728721306587976461132818478375183297392071825540319981321396961623733128633875913362527609945127647990218547273224124188508365182819394283675063195461312778970347189040924051475686174394448637914006655445561799419466978343993008162568865529686387813330201731481257 ,</text:p>
      <text:p text:style-name="P2">a[ 55 ]= 431359146674415826280366780263687151917567395403311647032558312244203 , b[ 55 ]= 32317006071311007300714876688669951960444102669715484032130345427524655138867890893197201411522913463688717960921898019494119559150490921095088154191598967728176821681396126401934578282002099104750555659977348955770434927131242080949607915742132221308458652902659515615547494466436684552657440428967906611065212594205368407448419166689025268491905699777337124445968085686579697361925155880118670857973064557155867648766347163784106403926466751239261090877143608188199562757191037392147503645205898392119869395942419693509914126254531611041968119834920086061411071339298394349994370096384668239236094544774912673311711 ,</text:p>
      <text:p text:style-name="P2">a[ 56 ]= 431359146674417568706642239329772951062143286858444355679505637192917 , b[ 56 ]= <text:soft-page-break/>32317006071311007300714876688669951960444102669715484032130345427524655138867890893197201411522913463688717960921898019494119559150490921095088153648659544359090991293971669813439833943853840572743724265870510877502985413826901809462412297786913496639634808903351860108664606637895915669392873543796058312021516403706092289036479925984284665105665886581549351699650467816908374978262144743224166520527416342609183776274869922542417068906355938765690972159583949177822671590783164790907339496298755515004185450465353730355308419306159227238240897408691699204863350960196165085989029434140417235814898537094895721141473 ,</text:p>
      <text:p text:style-name="P2">a[ 57 ]= 431359146674413306289365647285991789341110402588624541846989178468389 , b[ 57 ]= 32317006071311007300714876688669951960444102669715484032130345427524655138867890893197201411522913463688717960921898019494119559150490921095088153814738101734956637527726852917321962666121288450903848050138051506329385132130926223826999850083381995488733416945783308824338294050241889060938007159946083858424364257946889850992301340396161707597247058097303929884539511782933791744384442797771100869416286752810653010803445506665656235750441934300478103194826758011656074827275876245642702185942996622436960043421918668218762826832196443332667205602074584944771870357597777742411868498448635750068980253792019923986663 ,</text:p>
      <text:p text:style-name="P2">a[ 58 ]= 431359146674414284851260140411184933897071350956163294529535015827811 , b[ 58 ]= 32317006071311007300714876688669951960444102669715484032130345427524655138867890893197201411522913463688717960921898019494119559150490921095088153210944787788417713382513264020982139311791086411664832211612284375569506415061286636874411226642668921767720882227946806484837454583303253679834830407147529138596854503224549668724096660752029306693786056266772098246764193445604252646020514727545200689249427705339935870794655104728966073919526678706371908338099509300414569912599252958562530962854196841853520880066922334263795771404296033040119765308638463725908406920330122279784736401745796297765823654515604362178589 ,</text:p>
      <text:p text:style-name="P2">a[ 59 ]= 431359146674421231581784597464567209920237641572866085680771938449769 , b[ 59 ]= 32317006071311007300714876688669951960444102669715484032130345427524655138867890893197201411522913463688717960921898019494119559150490921095088154250514239200032475086125093763317872200540620188473526589439788654992599480324470898510454498168039927924236174003937578421278128403955808479806340631208087198134295159137112539771095038795070000456040664375593884889460125686033529203688060228371188245430602274117005796664919645879391769830808324692179055903024658809043846784466742954911793756885016808441717209986235444066137050142209817523677198872730926940214840730362161548627905326163333041626016039736485822592287 ,</text:p>
      <text:p text:style-name="P2">a[ 60 ]= 431359146674429503751843375933299852874587420269873304749944628343991 , b[ 60 ]= 32317006071311007300714876688669951960444102669715484032130345427524655138867890893197201411522913463688717960921898019494119559150490921095088153480015214225392759711738129742673776905019695256331910484258498888941697332688186071591985075498223342615894316052447692072320952076456666730834236841262278930693896860120233438562610531193191501571081988087131713839089164379835228269316419019976550141914301177830118155011075210668606712752771879275523717685106565734147398857898106905455225681445007192441825686889806884933241282296855319691933430832006970199224006773704679779148003004801239085407048541501143126151463 ,</text:p>
      <text:p text:style-name="P2">a[ 61 ]= 431359146674414118750868306935402828586893890784660819180320591093561 , b[ 61 ]= 3231700607131100730071487668866995196044410266971548403213034542752465513886789089319720141152291346368871796092189801949411955915049092109508815245258994361370<text:soft-page-break/>0028549275662591182858578933387814397221906874316677896012805913324443090277185645931464080990537974006346547170764384606078624306073905328285035189340928894875022256564614864623135499637562505846291857913197040864789384335972391201898103785210879598770863126767589076319590204612655673272061826540617109972016967920009264874620284081624769619772233338807073042520265190682029416022642662442065720514798891439368405929212046822175074083304872842234790818859 ,</text:p>
      <text:p text:style-name="P2">a[ 62 ]= 431359146674432865754677133384765311423478064907981137909050515360443 , b[ 62 ]= 32317006071311007300714876688669951960444102669715484032130345427524655138867890893197201411522913463688717960921898019494119559150490921095088153995121617512731066229380992906088320760482492722110345300452224805154102813278360270236138773784490349793334781091124415379487064265204103025428646958703092102199454849657016196189787767477530847157939489888055206553622928486345497956050908360492160840754763217183259852393827248103056115240828289979349660723502794274809188832844565662658676434000120921473333622695453989820781146535512518525831985231911104609147499857304926818691032881782038516084612885305286627101479 ,</text:p>
      <text:p text:style-name="P2">a[ 63 ]= 431359146674419747032357789705643167584517015702592999992453415232423 , b[ 63 ]= 32317006071311007300714876688669951960444102669715484032130345427524655138867890893197201411522913463688717960921898019494119559150490921095088154685180702568127846135197289045530830313772804963994481175180850451120716239032631664850671768344013241939382407349098943045953136054470232215275213857427008359159366211862786317818567459469768578404610058431034410969343727918995999897383187487376371547471433443568342142755271064948444582514382447111406942900191288589307450875231516244632098797326562717038212045064071159715660510805215247284955866129744208617783482109803428590119490396768653655905948134057564969913467 ,</text:p>
      <text:p text:style-name="P2">a[ 64 ]= 431359146674421839302070946541787526601653558591725915084877887222521 , b[ 64 ]= 32317006071311007300714876688669951960444102669715484032130345427524655138867890893197201411522913463688717960921898019494119559150490921095088154165358257883151578044412683929595226781845076728353031899867270756722837493480019405745379621039071880529941451717573940690807540180842792512462009271749226596870023250358521829152630301710914433735039798472066535651914420933451012547085453489889642569236595342208441516515915165836429703421525457246571488035005920184139968310102213950846307490600877195051853488787292297695837379033461824400245981867379351737292311323647926037284801740143348666537765758902204570895371 ,</text:p>
      <text:p text:style-name="P2">a[ 65 ]= 431359146674429109638561972960693495581878700153949143243526628458951 , b[ 65 ]= 32317006071311007300714876688669951960444102669715484032130345427524655138867890893197201411522913463688717960921898019494119559150490921095088153655048034061021503591416674435618971990473311308745309809048205094394746955607927540378210110653000269043711821853052460814807761316686334400474983315166774491759833165896981078037391949427696961732150815447419295781551196261059072635105581005380714590610756739305407560919591720195948993798104958067356001426750499294253363810305880024521945331424193475846964083741063817561952597324353564249850125920190971481020094634501768033111274821766390525278537353308662398780089 ,</text:p>
      <text:p text:style-name="P2">a[ 66 ]= 431359146674430319149000433792662356917400341607517540795502699907003 , b[ 66 ]= 32317006071311007300714876688669951960444102669715484032130345427524655138867890893197201411522913463688717960921898019494119559150490921095088154063902871402332113224924459603697739081929084547868032181800238041929663401516038437297309602117502986041428003386451933127078082152171944576759515888271331342041771953452525<text:soft-page-break/>200302770130635190365496326351786907012794034613250517035247427322009633024011844029834281074141391109988024558640582605383563439526230552798929414277885466410122345721061147167236265495889856617424743238019007569611556203973756653955929083534893035556502285840269378945636142554529196342600296859 ,</text:p>
      <text:p text:style-name="P2">a[ 67 ]= 431359146674429793775288306930836519202050314562477579297462335520329 , b[ 67 ]= 32317006071311007300714876688669951960444102669715484032130345427524655138867890893197201411522913463688717960921898019494119559150490921095088153995121617512731066229380992906088320760482492722110345300452224805154102813278360270236138773784490349793334781091124415379487064265204103025428646958703092102199454849657016196189787767477530847157939489888055206553622928486345497956050908360492160840754763217183259852393827248103056115240828289979349660723539938783217216325915729956848805974701229167285533247982937746396255947620923190422672732920077959856696567276077873060478441903584474063387694596749354145876891 ,</text:p>
      <text:p text:style-name="P2">a[ 68 ]= 431359146674417903026374920780313439495105074929420847878304369638347 , b[ 68 ]= 32317006071311007300714876688669951960444102669715484032130345427524655138867890893197201411522913463688717960921898019494119559150490921095088153109925214718134694307431387738853843143258955635527388404218497223939799642585802788745719809099997481210954932225604720842810975893402279748786742687236140630047523240638823460015491138748757065774642405927369941909138677061929721720542315575609638366024047239154952565793390263232274821546599931398583245331611336512673536007311036559334682814120209687437293290893933956587223536456904315104276221429396135130114283455178872747784039313585882672156738844250877824021451 ,</text:p>
      <text:p text:style-name="P2">a[ 69 ]= 431359146674432378283137421727076437969142492636330548744231619547493 , b[ 69 ]= 32317006071311007300714876688669951960444102669715484032130345427524655138867890893197201411522913463688717960921898019494119559150490921095088152823741560408770608915157339793894751235098033082072926794162784494504124983627534262064839612742189678368096604011733877709485166401136747410669784160644939249519860353280243067803525431963744552465744410449384254356592320147192660801674124870723293963842822721871870101204998816899729314519902519481495885210509058059960473292350823858514076084457404336526434719696577975062064387903191389158040041855144167044110483891843005052495004535786263332946221948043984344877141 ,</text:p>
      <text:p text:style-name="P2">a[ 70 ]= 431359146674419313014052993345397168798811727052201964504612283017843 , b[ 70 ]= 32317006071311007300714876688669951960444102669715484032130345427524655138867890893197201411522913463688717960921898019494119559150490921095088154000511220718072110359401448444163992815800707950111782537029539773006362256321127735124253032789962557603786029421166847365434700374808357537560199776406137669332399189314693096290742740626141741325346735075842615471614049665371655840753137648733986620967778860163124705613987438914069582215304748261156934028693111071163812242956191234111301976919518452175926463452905236272847770987439137093327466302347880290352191850724243330079385287534516237907507277207487727232219 ,</text:p>
      <text:p text:style-name="P2">a[ 71 ]= 431359146674420808849560819982886271221771724412276632954143672833343 , b[ 71 ]= 323170060713110073007148766886699519604441026697154840321303454275246551388678908931972014115229134636887179609218980194941195591504909210950881535069801265422106968002863540504603956635422851700071959466941050502268420022170819364692466565445768774762913335542888769156220481674992919493500379168226210966653196039176831318930285793024489197208529012834618470476485276694299289325848897849115965938140140803752519488620587729441981857983208477739742631409797461147989479320264594<text:soft-page-break/>91065243441425073620231675713099266440914568802088881967463918408824587146989732787262268320098998708067272206988405594624068637817973877 ,</text:p>
      <text:p text:style-name="P2">a[ 72 ]= 431359146674416399599599230215281626328656833497042747235723894068069 , b[ 72 ]= 32317006071311007300714876688669951960444102669715484032130345427524655138867890893197201411522913463688717960921898019494119559150490921095088154117427826216368353873986751712489976564171968423988173950755760309488005195478588616222643876370802710416053895322868421097443872704661090684112672267364050692681079435578135471457958878097560569569149724916607697524798483256570769443151596499055574164730912554832510115068943955195667180753660607662015753342155227634567799127225325896861363379416937835928500178176480023473759471497831534631910881284728499508704182643359592614284288806896036662106287739056370543689693 ,</text:p>
      <text:p text:style-name="P2">a[ 73 ]= 431359146674424494442375972641568672066261947403398563710732201314473 , b[ 73 ]= 32317006071311007300714876688669951960444102669715484032130345427524655138867890893197201411522913463688717960921898019494119559150490921095088152757832912048949194716618478907116665616791848165030416113667329249936460024174183965954682977970263849416802294472436122292059001344662779601121050050818949457732563596933076243321911607704222010079222713170584977285185036981780108919755573470926380186422022790494527075205167162856147877124444886925885284448641896119484692982755907683164631760931642183489854650301010778730570865988372327886786398519479544565270803456954459316953135187903340990905458180173499800968593 ,</text:p>
      <text:p text:style-name="P2">a[ 74 ]= 431359146674428193705026986591685383324335511461319296666292502351081 , b[ 74 ]= 32317006071311007300714876688669951960444102669715484032130345427524655138867890893197201411522913463688717960921898019494119559150490921095088152758378910481769908544779178401413835499533373000114561249063030997835756520061908777789448132141204520662864689702980558464634323213201286330643116602513895076428107253849838278988337788686602729475019826675324890611552333349587806137625423650147093327701117976465233078505861244134671546712854971712851946529287401914568034674014726485047635035275062140759593845440091121347512736749603501549977835918805274667486842331375537054223864544504503434811056612115478449251479 ,</text:p>
      <text:p text:style-name="P2">a[ 75 ]= 431359146674421347471374241913847746011598451706206798403814749359487 , b[ 75 ]= 32317006071311007300714876688669951960444102669715484032130345427524655138867890893197201411522913463688717960921898019494119559150490921095088152503561138667039458276281081034255612862148328125013434992218944206114167479880876845661906509667160545992497173753094061012729294074224263256937375749168898171766729504958902025013962959824118943123847606843880657808171872747626590159198374765340310174645397958729060476646687723699580522329374197929683610280464671730831532888816991433482607369542666052782677343900939683876805646020442521093945899375407179187676601340148076178355753215323916793515106148990211326726763 ,</text:p>
      <text:p text:style-name="P2">a[ 76 ]= 431359146674411635005792858656598698204753102094871452910791248069117 , b[ 76 ]= 32317006071311007300714876688669951960444102669715484032130345427524655138867890893197201411522913463688717960921898019494119559150490921095088153756206614669589912457947143202650133090525308326678277389644807424877425252371293862695888999705990570976668189104345919468959841318588371168040718555315799756007889492191524376708978015428637730100657501950640882477538466775050677600424637275421999737193491229157884030601103549038441686502396698399494811165256455764815060180342177052338024618954160124859189442277834202624531617785885118608279130696166406553756442248218398829875477133089257486603532771088201155898699 ,</text:p>
      <text:p text:style-name="P2"><text:soft-page-break/>a[ 77 ]= 431359146674410966400718456158960530638453874960036262078748339279791 , b[ 77 ]= 32317006071311007300714876688669951960444102669715484032130345427524655138867890893197201411522913463688717960921898019494119559150490921095088152764091866740432116880688010902654630006355197185700904441221051810878776503216283009260122823470773630419866243824669239844892854010178799681902642880994439626152374283838917729493192260716182267550074608857165425141550368864835297611258335866367056499450450578993732936832725803450135118178487264267593565486120305947770486823998437879052276105846602648460565036004521913425953096879411669979039680854250607530327745747786263726597553130105368724948137531660441348559881 ,</text:p>
      <text:p text:style-name="P2">a[ 78 ]= 431359146674413781434691893547178632115584886116866515918627291993161 , b[ 78 ]= 32317006071311007300714876688669951960444102669715484032130345427524655138867890893197201411522913463688717960921898019494119559150490921095088154090961024245073063538129317142271957143595565876746848675630241872426008487981271617189254068236425095487005872963102989547592847981622273963118441472655240234630088170070613683828221112646615374779596357973963856433702072267278917422646197073999367829861718237095893494655512097575864202228836197500819900288728084801188853627074604678486214960922489589478142144312031196702887425821063455047434568649712934525587562639928445309849040082560207007784405027178628314193661 ,</text:p>
      <text:p text:style-name="P3">a[ 79 ]= 431359146674415335018787947597634285817906869501566488614998852026097 , b[ 79 ]= 32317006071311007300714876688669951960444102669715484032130345427524655138867890893197201411522913463688717960921898019494119559150490921095088153739108137909253630114340071293011572057964016628568321668617630420053020886276466606320677452551274146805923601164614996512419247311386477025871980494325239708444174867365643300711123365401643622447077733017015623976069576551194968451402254552154253776422926816089998730376224585579860316970824667335042109917972179747296412932977822475154668931403989427222735103840975975443323721568974346118444183131132739805931273507561307829032225869309054502247232132997033523250207 ,</text:p>
      <text:p text:style-name="P3">a[ 80 ]= 431359146674417680208438593102350200984442317617569150650825323072921 , b[ 80 ]= 32317006071311007300714876688669951960444102669715484032130345427524655138867890893197201411522913463688717960921898019494119559150490921095088153723756342255334212456699352484263549413606731544447168359972269125788036594146471375374331749816428184444790430685655183985498911016207925333058971877269487327550509693189444576347911363779255767164317623828761197035739754950186985139033255234658358252647329463833638462209096078493208649286427513073124795354372152501764077061273111905137019795080978215736506041382902748957761378765949541667001844273653871576102600934776810551672097246635771816160045801341672235897741 ,</text:p>
      <text:p text:style-name="P3">a[ 81 ]= 431359146674424018433621962200984339664655476605359941122358131310959 , b[ 81 ]= 32317006071311007300714876688669951960444102669715484032130345427524655138867890893197201411522913463688717960921898019494119559150490921095088153837926681160020316018443065333779780571379985389292704804920400396909428435957280342087979160459792180499418714364706021046303826963927301273390916782858433746974846054401572039665344275748670812943316985038563069896058809423115040798895379903027964212235321977439150640985227984287326419006096514344039814106549369600356728296903177607370963621450254193302280743037302615791037732473203194450188161146892939632629704201747218508330271035209323327048102454114928189664671 ,</text:p>
      <text:p text:style-name="P3">a[ 82 ]= 431359146674427493504525109382089069291326208694540851021698506223723 , b[ 82 ]= <text:soft-page-break/>32317006071311007300714876688669951960444102669715484032130345427524655138867890893197201411522913463688717960921898019494119559150490921095088153346995740438449089416649834690228499608194838145528505519131631438622023376121591347793156282990495339598965336508531356417455211421497042517741624569317945018860895321422562865991808530363611921293216403052157061013067115439538195035247916933815883596418530794536980847834225254007763202897476509767073764308093715035111938725663449630176303296276750535998811673861954103734742717707031547167959959003253679484258008925324276051389311378868600586206171167182651432444133 ,</text:p>
      <text:p text:style-name="P3">a[ 83 ]= 431359146674419963851926022368248104067352727090303640729614600966179 , b[ 83 ]= 32317006071311007300714876688669951960444102669715484032130345427524655138867890893197201411522913463688717960921898019494119559150490921095088153506980126542210696800286354050460395663542285170007195946694105050226842002217081936469246656544576877476291333554288876915622048167499291949350037916822621096665319603917683131893028579302448919720852901283461847047648527669429928932584889784911596593814014080375251948862058772944198185798320847773974263137369437874608521058787522392161103621998680791943658687357616779404523188516245339948226606262796392897757106737384170887914676958532712970308057085640271739772787 ,</text:p>
      <text:p text:style-name="P3">a[ 84 ]= 431359146674427271972481862924487445215555327973405215793434053524563 , b[ 84 ]= 32317006071311007300714876688669951960444102669715484032130345427524655138867890893197201411522913463688717960921898019494119559150490921095088153132092752054780646499168822639365582793890509104780980079559568732521253001730386785958465336074198376739508043965215341804570958901032444485365974673896127905396456293544697860722483994946245440316605084958027677914778932633860571927897876636525440741758497788691872836721841014929677919483020738467095312550164168382008688721688469306908812306551303402979727421809003534923766050691651537410586550113257460342269825665646828636221633907015038401566670638500774501921369 ,</text:p>
      <text:p text:style-name="P3">a[ 85 ]= 431359146674423538177059114784297266201368146309542016421328166095987 , b[ 85 ]= 32317006071311007300714876688669951960444102669715484032130345427524655138867890893197201411522913463688717960921898019494119559150490921095088153393539032482914405490282732640331242997258810961514123585357746181524721914747156211724432258114938643439438801011053267479394482201548288240154299359946004329588060948962145143580445326571184247032082512840962933921395665380502625542488526713107440968052040684689135524704079289737244332279496994399840795031781698715510571377341676850182641573094720189839938616578780134587035033682617527469622874715757392482178682423690148625293673518100928801776864899108097141868259 ,</text:p>
      <text:p text:style-name="P3">a[ 86 ]= 431359146674422610254141118497393655177653115768137927014234561224921 , b[ 86 ]= 32317006071311007300714876688669951960444102669715484032130345427524655138867890893197201411522913463688717960921898019494119559150490921095088153883690164825003870418692638158334183495493508676770454124713119474423344250681149116506786057734785816892276599512372235919225969978829014128926172683514190734716706510251017108283889946287535643091733256256129861381152890058671596356251947106706667771953088573147830779621618505382545861774049233108309082190700348056129799036554341210730256135350582942086275266719345129985645329585212662929162766580962414883875457921047722503031318622102699910306618993050382236087157 ,</text:p>
      <text:p text:style-name="P3">a[ 87 ]= 431359146674415469558325954469567416807536454262904572876308241730451 , b[ 87 ]= 3231700607131100730071487668866995196044410266971548403213034542752465513886789089319720141152291346368871796092189801949411955915049092109508815282374156040877<text:soft-page-break/>0608915157339793894751235098033082072926794162784494504124983627534262064839612742189678368096604011733877709485166401136747410669784160644939249519860353280243067803525431963744552465744410449384254356592320147192660801674124870723293963842822721871870101204998816899729314519902519481495885217940655622690829604697299846598323477748213520093174648545001411209390852635324596469721178749899039492322746972094093787249871481982605266488553488560247578454033 ,</text:p>
      <text:p text:style-name="P3">a[ 88 ]= 431359146674432236740494616100955839381430876466396445358694112692607 , b[ 88 ]= 32317006071311007300714876688669951960444102669715484032130345427524655138867890893197201411522913463688717960921898019494119559150490921095088153559393025870588672959825083440262925750254464935949643421405008606311489732391355505489082496885373925533493214396626942564992603948813892954478664073240222183264129486799435446594822516347626739561771338793693363687158479827638786618780526252262608358857994607218025289699272100295605766553312951266077252095567101319275704450999023288013854763425735011563911515561910070259191323810791481717800464935837677173869824199510992713804759275839008998923946629725489356641133 ,</text:p>
      <text:p text:style-name="P3">a[ 89 ]= 431359146674416096041872714788751895270685927695215465867025653594569 , b[ 89 ]= 32317006071311007300714876688669951960444102669715484032130345427524655138867890893197201411522913463688717960921898019494119559150490921095088153175522899030509318407587173461821791844601899754279433970343235353017499484920328186724755108571738166910969062631939991210535859085773994804997847147042390020951977103219009287748527284007807847161855552303842266763635096248830569652952815577236006222848618983380160012169533041817553668032938351684053919808130508000633504307159473505017436265939575900538824848688238010983562855148467995956715746962332073258162364570578013531396958357837928588080166803987913011396871 ,</text:p>
      <text:p text:style-name="P3">a[ 90 ]= 431359146674414927141906218913582877774140975041285509708048822750707 , b[ 90 ]= 32317006071311007300714876688669951960444102669715484032130345427524655138867890893197201411522913463688717960921898019494119559150490921095088154695353956434681986802469158806926656256423135177463809445963658082004229416871987269978692311294370860674893884166168562614179796645209688716640958787677358746049414257657599536513102791378485237720665579261869930842845997528371099450669053341364206805497013877294617458839541845052672894960610310853520121684575976870009064307941231163600170375473651321898923921367994452014733867021282851740158721755177350480211427134926310475087645723077128615010781180022256863654953 ,</text:p>
      <text:p text:style-name="P3">a[ 91 ]= 431359146674419976098944367791881832886780168559816844040158166921913 , b[ 91 ]= 32317006071311007300714876688669951960444102669715484032130345427524655138867890893197201411522913463688717960921898019494119559150490921095088154182027862932740947217468518531289957827667693850669515294401118062496282481374133935019139531684320007391969273775413899179434198610173742129952254154578405329151008855281551565656570155049859636788119086224170104554894900214118040567363152679747978878779168422581008572568826676243042320680930129127908113788017436685899842588690786099920702187137549070578304844759631416933060927740119274655106756654338103954261981268583158556272553029811004877183848997255700119734839 ,</text:p>
      <text:p text:style-name="P3">a[ 92 ]= 431359146674430510964285216474848354439716037842769027167995517426367 , b[ 92 ]= 32317006071311007300714876688669951960444102669715484032130345427524655138867890893197201411522913463688717960921898019494119559150490921095088153880652737310846523571215746813749422616683947007574255821988684183694088190944990559087618492055190472027391733220522790045657509350491183546965965788433994334445875764229080<text:soft-page-break/>632532245787337231770828966039705256478300969866755457378650490896283179309824622141258241090311686508772523757210838074463559384684059555933806314537713076601267558268319797426543586793818481218636798846299135524584228883849135555149405827870334405325723788058888132773899693498837595081895093189 ,</text:p>
      <text:p text:style-name="P3">a[ 93 ]= 431359146674428609055936744733641133633801358084098587515760723215711 , b[ 93 ]= 32317006071311007300714876688669951960444102669715484032130345427524655138867890893197201411522913463688717960921898019494119559150490921095088154220461162292470503414110366656389596551131669042732786071853626043405875082966409018839941111684631413853538693680034255203624067807171718806589722307172447825478909428523743159707607868995341514475304935945348354988505314962915719023404376440988589203536738037414876105614725936616333598981216319493282219754821006702539746797817956747920003462969465649197885982731840431916396021200238380707104488654701354912058679605880770242149682352079758355509296553904812638911323 ,</text:p>
      <text:p text:style-name="P3">a[ 94 ]= 431359146674414586514378142669031985097925967934004669937978502608397 , b[ 94 ]= 32317006071311007300714876688669951960444102669715484032130345427524655138867890893197201411522913463688717960921898019494119559150490921095088153665532627983761034038155437859015475267088496607051782721678141950074319430719196364936656366167303777014250975810624383961482610308576735668677053155062976240378351118739718827015569202341040540361464475085311200371893315034899709255360574233930143292475105019423867855533261573601903829472284273969188081103244150824343508744462687594159905086291317621559538294527592099198916645068047630298576340610887482469516460505251327487321086008511217207821703602294940944364419 ,</text:p>
      <text:p text:style-name="P3">a[ 95 ]= 431359146674416115551092696109642224651157501016015049604583500446997 , b[ 95 ]= 32317006071311007300714876688669951960444102669715484032130345427524655138867890893197201411522913463688717960921898019494119559150490921095088153480015214225392759711738129742673776905019695256331910484258498888941697332688186071591985075498223342615894316052447692072320952076456666730834236841262278930693896860120233438562610531193191501571081988087131713839089164379835228269316419019976550141914301177830118155011075210668606712752771879275523717688464932816415208467799875343007328782453002424960444667856202861072045405033071053178922630150433763735744543963194098608477960790558085527872031550368545799095323 ,</text:p>
      <text:p text:style-name="P3">a[ 96 ]= 431359146674424822339174333432123560729635439132830718052597906091571 , b[ 96 ]= 32317006071311007300714876688669951960444102669715484032130345427524655138867890893197201411522913463688717960921898019494119559150490921095088152744719838680278301337576858203213801403648444410533698159934347728705677449928571465821790136476561971443576972602827897492153156563558773150123067673046027480857015124507924843978049707872555908511313512903767731492552206187052496306245405126307728655616046584073309099427069802888615293123206270098887164154072736447670114824552050113087993908519866777415215398198886069424628730554630329878266683382944851768509046637839373610058190683203186307836844718612337396149817 ,</text:p>
      <text:p text:style-name="P3">a[ 97 ]= 431359146674428403343050204967232924044438413248445241172395851018089 , b[ 97 ]= 323170060713110073007148766886699519604441026697154840321303454275246551388678908931972014115229134636887179609218980194941195591504909210950881527446995052846447955066595963395253465457919179918940283279406775100761229385731030140209457352131924001686161188104823262837627492139256588816936240178801809058973389447769014535818833902632423473800396439018607278425463149773952131081579888645456972064233250113229454509105875656634595684971243745316549225511067653024688627398295622<text:soft-page-break/>38575239690866759338798803808722010818255957315720498629670732248914895312579111233033764973254161101684833502394994949369587681855992533 ,</text:p>
      <text:p text:style-name="P3">a[ 98 ]= 431359146674422517658969352203708825164219409697360936013666042792141 , b[ 98 ]= 32317006071311007300714876688669951960444102669715484032130345427524655138867890893197201411522913463688717960921898019494119559150490921095088152990566572260754283573335076369731000611621452942375846881154805605528722394048407393251037444324510390029567987381226094403921541452479689035791407162240834579281176137020814908869059889650104213955247231910442741310758801346644268675203738825887469133427796653671919117190001263366843146003693873243794558015375888964551267879347264175009250771807871633837616758526079608362484727419600014468598675967095790075821130496885281826849687295671418245064956520001386160458087 ,</text:p>
      <text:p text:style-name="P3">a[ 99 ]= 431359146674412649056418172564775591177233612188044347053560080664341 , b[ 99 ]= 32317006071311007300714876688669951960444102669715484032130345427524655138867890893197201411522913463688717960921898019494119559150490921095088153832733156870609297889503602281604511869147168947011649364536194993485127681720506067574294968165452573829089023171613828249848798475548016620995641981720302697737783319902590351599492424638663308774621124785002160139753232329629422051747834457168933404974878636882481947890225450928472529832919511301011921368765095397142909216630444425908138907001399688507339847492930372640524365641780404491290774772654527385025186436139556822417111308574653674946724112644796574777523 ,</text:p>
      <text:p text:style-name="P3">a[ 100 ]= 431359146674423629878659645628634733879477877559685739937243826577937 , b[ 100 ]= 32317006071311007300714876688669951960444102669715484032130345427524655138867890893197201411522913463688717960921898019494119559150490921095088152590763904269988303929498777127252170002618337105237953934129168234707286608002472596764753669397556497147899992492329612872947313822556424344762753126458871010004436566846902480752830880270255450377432817377728721306587976461132818478375183297392071825540319981321396961623733128633875913362527609945127647984704866377958503492047151702837502580286469300653414818663979945956030829202056276728117177550704923754447497885855821996961160482275545826954870516514380652115973 ,</text:p>
      <text:p text:style-name="P3">a[ 101 ]= 431359146674424677868504341265872146956987843220273896648047553221857 , b[ 101 ]= 32317006071311007300714876688669951960444102669715484032130345427524655138867890893197201411522913463688717960921898019494119559150490921095088152606225089543091105730139615948048181654676024629323874390143037020945208541592470224170265126866490252626959121780181246609159998049900606426196182659357058307679745143217596884317040055716859362841526884695730357072411796006555944116727978208037331418799378198644436203744397654476628506417965630544558956499386386206393492266246025299544393253960418993403610821835125755405109309498633336197207279161229220109369084770047054011989555766997359410170148692999992199450267 ,</text:p>
      <text:p text:style-name="P3">a[ 102 ]= 431359146674412350782842170760458542317855615052040726363994324398669 , b[ 102 ]= 32317006071311007300714876688669951960444102669715484032130345427524655138867890893197201411522913463688717960921898019494119559150490921095088154601080968362972283994452457910901912705637599006988746297873169348470131346331540170682803330479366380428604203422346046773619616199804742885099066301521643025655797892668011413199154844570699398471996446441173152237438332068264436662528749813541272251698769282008800865557054398656992905583716018199762499138881505378397351776327670902662508379505335280257203466968480441009570979902506412537300137176694390602582971639979757704277754860141519249382526218599046948326637 ,</text:p>
      <text:p text:style-name="P3"><text:soft-page-break/>a[ 103 ]= 431359146674411810700212190391093010071070510342149383018184986616739 , b[ 103 ]= 32317006071311007300714876688669951960444102669715484032130345427524655138867890893197201411522913463688717960921898019494119559150490921095088154457920707617865099341060467267744010857263337578765841492138309090043153228990331430868966570296006709965130401943163652975019721710810030259278049786273847461487850031856998113711479946421954328678722450041423593474089849767298278825178826757927450820465939041678269032423602667987564470042899652337845442647428159243693991896616809838616518233372650495597062180671600861164870572324272053937829186375748500850744371216718341428031666275224101151970919512181416525247159 ,</text:p>
      <text:p text:style-name="P3">a[ 104 ]= 431359146674427563472363151109402193941503880684574389918404809421991 , b[ 104 ]= 32317006071311007300714876688669951960444102669715484032130345427524655138867890893197201411522913463688717960921898019494119559150490921095088154117427826216368353873986751712489976564171968423988173950755760309488005195478588616222643876370802710416053895322868421097443872704661090684112672267364050692681079435578135471457958878097560569569149724916607697524798483256570769443151596499055574164730912554832510115068943955195667180753660607662015753340659842802745396044142833670485066968381033944446055293974504775344417554523157894411106626330802602672963719231275868271063553293400636211853870780761756188286669 ,</text:p>
      <text:p text:style-name="P3">a[ 105 ]= 431359146674427320386915851966642965092583585222219160053828381043659 , b[ 105 ]= 32317006071311007300714876688669951960444102669715484032130345427524655138867890893197201411522913463688717960921898019494119559150490921095088154640670378898899367314271936126316244349988085549615662672223248181217452786315606843310932880462814534303346150971126896070317269425515678912224859262983471365103494454571278309561947723753553042842180614619285745337315428952497771890621346830671155770883471164843785603229285812837822546656576102900613033398014432027233497822025859937009621461128287251702391016090402831566421951034498011182884671921278603748033812053709037230003875250779125482325407790201285966422721 ,</text:p>
      <text:p text:style-name="P3">a[ 106 ]= 431359146674432439632317620409388691101422677880007463252794210284633 , b[ 106 ]= 32317006071311007300714876688669951960444102669715484032130345427524655138867890893197201411522913463688717960921898019494119559150490921095088154424279114183479409772581068115661872646896829587805096241366737806145370452397344293584707356391147464926596456302481212245109913192490388322596822192832640753802216487732156229755206544940979107712104893768458604090623073778706659207945059518194906529139956917464177931106451696860839202660117083528757582549161053490620324147260002098067600705164981289443453691842418901071924007223252648630464892706081257131917384791914375285286385991075792961717389650064493525490777 ,</text:p>
      <text:p text:style-name="P3">a[ 107 ]= 431359146674426281432850701053879434522383281087951862471288733829437 , b[ 107 ]= 32317006071311007300714876688669951960444102669715484032130345427524655138867890893197201411522913463688717960921898019494119559150490921095088152727079885233234209022945263098030979605621450964272743415984219726355263010812645620416268638656130257215938619318095484260019270582070591620249906054325804907843886822989961661235438864041354651955330392704328299215144072216218518967282521786060328230508722887177875951972729650166018568298924680099071367115722335420262158317499582487118823051791337518290321646290159642793627022885080381933460308520669589277826310283671037958041887667996742396062498657102625155271601 ,</text:p>
      <text:p text:style-name="P3">a[ 108 ]= 431359146674414046509299092930537488942317322269215842143120654103501 , b[ 108 ]= <text:soft-page-break/>32317006071311007300714876688669951960444102669715484032130345427524655138867890893197201411522913463688717960921898019494119559150490921095088152765270282947828371239440361392041508946042597047181039443674505095528015233509865144886442506266999758176624326351993070713707516845613527576730236488452166697896736816742630591634976243302604258831082455970293154694630056838840003543468664798684238540585672632939831791929841103687449568633583901796427884223551313395162740529882005740286338380050642051858612737602959180088043466284030345873159693782736256930001975303219953454320139527124120753131700469978687214975593 ,</text:p>
      <text:p text:style-name="P3">a[ 109 ]= 431359146674413017217403954117039513484618589719506409907015036168927 , b[ 109 ]= 32317006071311007300714876688669951960444102669715484032130345427524655138867890893197201411522913463688717960921898019494119559150490921095088153362383555801276414985294294761537009378655481551146959203466111716670798874711534485770300792325601481326269085350792759287925363676006706067762979082864737136145907203742480597713995099358401608907147292037056611536337671777046704676708707220464434167223055503737560457327848610915743361432059516015325670918080882858528301781092685473875972339731064473330800916377172400465461677745451870128346031265012403694388916724048186119297428958633137414488692339480126791172711 ,</text:p>
      <text:p text:style-name="P3">a[ 110 ]= 431359146674430729203154226690426387342550140229944219138424163100747 , b[ 110 ]= 32317006071311007300714876688669951960444102669715484032130345427524655138867890893197201411522913463688717960921898019494119559150490921095088152682525987935951851774883558830812613779303506728157562748163937251095777834970424180614834031709118947694086536143297543933828427178973383060600750796287178489639007718949112632165412929920543270241742935163741936572114528431301091617819838172961797548929530097289133300796558778738615452570289920992067824656630662548600275646843054995302828843393620470483181486479474003739789412137082307333463631027946859093700394564004858994322863618788664658380135615871923554888363 ,</text:p>
      <text:p text:style-name="P3">a[ 111 ]= 431359146674411796289577686677557282991691753840175227410911268978217 , b[ 111 ]= 32317006071311007300714876688669951960444102669715484032130345427524655138867890893197201411522913463688717960921898019494119559150490921095088154090961024245073063538129317142271957143595565876746848675630241872426008487981271617189254068236425095487005872963102989547592847981622273963118441472655240234630088170070613683828221112646615374779596357973963856433702072267278917422646197073999367829861718237095893494655512097575864202228836197500819900286663449494895732478270453919410092294956800155922501427733662680839570313256608057309464785293262158945645385036290029840508783317915803338081435320346750357827949 ,</text:p>
      <text:p text:style-name="P3">a[ 112 ]= 431359146674412203635020882487159117399306205980682120129296774454957 , b[ 112 ]= 32317006071311007300714876688669951960444102669715484032130345427524655138867890893197201411522913463688717960921898019494119559150490921095088152523090251608680571355255177093144518752221787841335757713843661029933227487893409387294244805852496161717452727970993436413503560960186314812671870574764127882646727828044074189677866922249796440859548080534628190465963769649660749997373123026921107151574639594627044733814811761771513918429108641352498552356595266001849641192251410006120899085844674981010717617551522120987314078992863618885799197768625393128798975873589886749416733942308279259046007945634046413416843 ,</text:p>
      <text:p text:style-name="P3">a[ 113 ]= 431359146674418429330287167877092393920020389692478215881756259166913 , b[ 113 ]= 3231700607131100730071487668866995196044410266971548403213034542752465513886789089319720141152291346368871796092189801949411955915049092109508815477118470410617<text:soft-page-break/>2370072549841304752417486814210191539707608510242818384807733960827277707150829504668849986768309076067407500937358443232678370093604154415480206045125829836014231268136455027702027156915491776588916937753906864765091658667594057026187110990621852570368070314653155580138108761786855265800613554672012492662740693114156319945843582030290540834951795936787937589650677641969428003410699578827849080014152257279273014458277829601108151297148637390752138105409 ,</text:p>
      <text:p text:style-name="P3">a[ 114 ]= 431359146674410833056734460549872577456018973944643001259559370031503 , b[ 114 ]= 32317006071311007300714876688669951960444102669715484032130345427524655138867890893197201411522913463688717960921898019494119559150490921095088153733394988825597268095824152382442295286013159475522142821343500833006875682530765030593949234419776449364948971141623844091777687521050660077946456646805663896747791420309413320188287230805830669852048803191724098420466933248278844609840585424964522644036394388310191487995149668395974216110919431247183068090796403400114978124807153142010594789503052185571968876868981954984189660067284905769661252614190974344724316113545434171849277073375068046768262325231002953765379 ,</text:p>
      <text:p text:style-name="P3">a[ 115 ]= 431359146674425861618788974060345716327516829455880267681092035721499 , b[ 115 ]= 32317006071311007300714876688669951960444102669715484032130345427524655138867890893197201411522913463688717960921898019494119559150490921095088153418222704603272931285369305586342363863615750220671211739778987902086553726003989937328438318094894509595864733666348000191223193743010425152002610223117122826689697027701855642926556677035252009812702961734912364836442020682883518378607267636331408106479570973485848842212647794906548990204703376410980403478400837577252981405357891459412209999666107853326141783344699555967049797595884987699232423811569414086243197045455999452547216521607828492888562298754670172814021 ,</text:p>
      <text:p text:style-name="P3">a[ 116 ]= 431359146674431369389511978993323673299456263691221730814091387933129 , b[ 116 ]= 32317006071311007300714876688669951960444102669715484032130345427524655138867890893197201411522913463688717960921898019494119559150490921095088153725745269401906348601948361624526357483414855178227504294721537616473671296995845989683243315499183353629777102952720662448318493084268076273907447304939269409790413905300337789572916694142900680978658968041612054063947587221137554804583945891749697638156436987862630081571319124964362029158701350531078533143425505479577260071801317091937226200464160317842499012610547436382924146817079824149090824751337179555971923057239271286745433679765354725278262037412822344208971 ,</text:p>
      <text:p text:style-name="P3">a[ 117 ]= 431359146674423462681456505262176579167588610853830197425979216449981 , b[ 117 ]= 32317006071311007300714876688669951960444102669715484032130345427524655138867890893197201411522913463688717960921898019494119559150490921095088154441847274064575232210529215867617535080756623424582740694211666527782187134847316688855099487683517769718959324634771095366632529221848183223802438919095548713047099804723298323552794873799324303118713492620007802759795613205817090157833525981623451010001855677666589310576920356223017670761724972560628909637771633651898086315243511402188339133106284893271950347250641063731508061465326431016154915210894520748417413891714950691768003630688571562820312263185841987732473 ,</text:p>
      <text:p text:style-name="P3">a[ 118 ]= 431359146674431180221509052705235358532742808778758790669022150842619 , b[ 118 ]= 32317006071311007300714876688669951960444102669715484032130345427524655138867890893197201411522913463688717960921898019494119559150490921095088153771710457652024362693340672927139633845753314077066340648719839739956724111277683223146841923931576136842671034657836709113908114601623266421909460298873677983464652434242594<text:soft-page-break/>783501180492090228769746032381691088007882741644147466998833816679815354176422417080787701399310114454494322968344805866652112827994000993101277054291629457209294503926106031987267689505618425522006633900174398455711481924602527869043865539779259938119320826681821592422791497178971321202054418833 ,</text:p>
      <text:p text:style-name="P3">a[ 119 ]= 431359146674412710464286796371156914629136761624257001853352340157201 , b[ 119 ]= 32317006071311007300714876688669951960444102669715484032130345427524655138867890893197201411522913463688717960921898019494119559150490921095088153665532627983761034038155437859015475267088496607051782721678141950074319430719196364936656366167303777014250975810624383961482610308576735668677053155062976240378351118739718827015569202341040540361464475085311200371893315034899709255360574233930143292475105019423867855533261573601903829472284273969188081098256212013184710666364626537462561674325454216819550567717331656068875719219554709915500419345061835232136009023252282285444124814626602857278281885897116952896323 ,</text:p>
      <text:p text:style-name="P3">a[ 120 ]= 431359146674424778908871975023846308383528048735192868868281729439773 , b[ 120 ]= 32317006071311007300714876688669951960444102669715484032130345427524655138867890893197201411522913463688717960921898019494119559150490921095088153350325476181868857570274191096092738252733701011276069303743259960038879460765654246570266465883684969290735288482329214183666898806521252875604196309891607224212305609964666559252304515031304699747793386001474014582915199264323935093409788019188737272696623203531867488148171738554974725846663204757027426073388135420560033410659275846882183009201821449363548651545852495911205287491152401011614931886376051013227125011294123087717935043113155253525909902833794512370041 ,</text:p>
      <text:p text:style-name="P3">a[ 121 ]= 431359146674415064025738523990450880290490866944874880920903496003087 , b[ 121 ]= 32317006071311007300714876688669951960444102669715484032130345427524655138867890893197201411522913463688717960921898019494119559150490921095088153660928087638992439432561412100689285401486879270838735833448186739196004972691795120538469790363835251039681625145929984014989642033135787032571352983645834884970884315852031078874705659790997687453802591752802378324862225375251658346601013345227348251541527908985603756023797149339665975105813292833328343631273118486789383389524253175048906418557518695561077009637400384404212174927927764195429609586342919859232091877155076372452558357101552924862129152722303683221959 ,</text:p>
      <text:p text:style-name="P3">a[ 122 ]= 431359146674410610466198653255364514879180103500174746425445025116067 , b[ 122 ]= 32317006071311007300714876688669951960444102669715484032130345427524655138867890893197201411522913463688717960921898019494119559150490921095088153655048034061021503591416674435618971990473311308745309809048205094394746955607927540378210110653000269043711821853052460814807761316686334400474983315166774491759833165896981078037391949427696961732150815447419295781551196261059072635105581005380714590610756739305407560919591720195948993798104958067356001432662560245765336980677264904372078162521055381732577997163564244433009369655632989553380302046497344277318430735816934998549420602772750789299402393649405643175039 ,</text:p>
      <text:p text:style-name="P3">a[ 123 ]= 431359146674423818731754640998080060505309618415768987366361461402677 , b[ 123 ]= 323170060713110073007148766886699519604441026697154840321303454275246551388678908931972014115229134636887179609218980194941195591504909210950881534558044695063204097208568614759314715507572378133542459589835390077948596742355800519912601880983698448639336658291259947799187253704038885919282137424452093279542881907005916245687743322373520258420554032121691470975439843082337968244650968639797274612989922960211776534601856725391082104562436301765033748757624930716419307072002106<text:soft-page-break/>96469433033412816397887394633535066364164952036103390787831902112121276685116994678143029041358009769535281738672320169811297976666148379 ,</text:p>
      <text:p text:style-name="P3">a[ 124 ]= 431359146674429438611619273866958611347494420823038251505056248018577 , b[ 124 ]= 32317006071311007300714876688669951960444102669715484032130345427524655138867890893197201411522913463688717960921898019494119559150490921095088152523090251608680571355255177093144518752221787841335757713843661029933227487893409387294244805852496161717452727970993436413503560960186314812671870574764127882646727828044074189677866922249796440859548080534628190465963769649660749997373123026921107151574639594627044733814811761771513918429108641352498552357098926740261025487566079768487852172868367448549962597209069232153378114793344411505865776480701807993663257077890957644448471451606224181296182221326525780692549 ,</text:p>
      <text:p text:style-name="P3">a[ 125 ]= 431359146674431788070498889719908313454102526374550797752879735369297 , b[ 125 ]= 32317006071311007300714876688669951960444102669715484032130345427524655138867890893197201411522913463688717960921898019494119559150490921095088152775238168554359132246034850898137298413016365267552403233045662974383012220556032750104654328823315064096611314486865908721989148060091738448975270513682271521384194865168771814678141859044422783648672029143650682747944802191738199634231982624320707321961579182761177721077370236028262949709413255591829835712674916407331812876788279561653057041956719680554807057335301531939314490965269351811872846985302802608783668653495609310072667919747802909996391488129646603389411 ,</text:p>
      <text:p text:style-name="P3">a[ 126 ]= 431359146674416549855212406420412925363470486445352066600250068982027 , b[ 126 ]= 32317006071311007300714876688669951960444102669715484032130345427524655138867890893197201411522913463688717960921898019494119559150490921095088153438948118270518052784903016599834878784094417530373426475876246799344716674155715794336060907955332760766081160257375395456338062598389863193335973184540229157227855566668952328900043825065500695557013476468867044672140977865188036274384548322675365473644318455388691825505897825511986438078349970059270635449639562067840061325159820554877838107586324457194523082662206063874121232332682845071191778066203553325177582436570745365384335167774832703911146632236468135759351 ,</text:p>
      <text:p text:style-name="P3">a[ 127 ]= 431359146674419883769035148673755882518868993153951048128760284235797 , b[ 127 ]= 32317006071311007300714876688669951960444102669715484032130345427524655138867890893197201411522913463688717960921898019494119559150490921095088154637831860007461251760135030324527364065032481463612934404520818713412018027563170253223780887312653814840887730667841451903862366895935923471074444710115973252169353734168471073859287585001327918658745399670282154719565569018861273321769487518007937618856003587923177156414870739150294092382856234938966196444769637469812179750473969803516609180088312098796526511995048649049051898430772732406571154484772805898302074187983509954991252534816765852686764614510251227287139 ,</text:p>
      <text:p text:style-name="P3">a[ 128 ]= 431359146674419441327274321704517733246298667520962062012595689545697 , b[ 128 ]= 32317006071311007300714876688669951960444102669715484032130345427524655138867890893197201411522913463688717960921898019494119559150490921095088153837926681160020316018443065333779780571379985389292704804920400396909428435957280342087979160459792180499418714364706021046303826963927301273390916782858433746974846054401572039665344275748670812943316985038563069896058809423115040798895379903027964212235321977439150640985227984287326419006096514344039814107730850269795382239101364578380214838304073818059652048599491979010385073661705689761133909353414770409347178768630887596548784786648352579958677044634042232435113 ,</text:p>
      <text:p text:style-name="P3"><text:soft-page-break/>a[ 129 ]= 431359146674429331562287658222977101741319381631364380122509344388923 , b[ 129 ]= 32317006071311007300714876688669951960444102669715484032130345427524655138867890893197201411522913463688717960921898019494119559150490921095088153622903683320615474888376649277102713997393763225729963512460139470613598896038719898891974470193190457827218307748264592675031904702088502266015029856769534963614451954355895914454682500671782970097795527351623147237102854767172347701885257140928186855998047730811609479133672266849769403831017511620105303865017608097761597769539289294751207287716429348329685011283873482434410780426642122937191464188864467691949124071789636656468193546895305342079595366189251270531229 ,</text:p>
      <text:p text:style-name="P3">a[ 130 ]= 431359146674415903686334717481964315896690250700238787441447125095149 , b[ 130 ]= 32317006071311007300714876688669951960444102669715484032130345427524655138867890893197201411522913463688717960921898019494119559150490921095088153642384855148085128629163886816697716719761401407350646480842312357905650934532491474863004665249030960624367866004837105660575588114342322100665879080035617166677006084120767553397895607567677782804923543189368036153949140460092785063772818412650424619503482813603295375823746079885151429279641369121600984978921846720555156227172352770454663750405494209548907253104303782657151876628664924170655275466894218101876094020634995244430075697381758672611770260899571637856769 ,</text:p>
      <text:p text:style-name="P3">a[ 131 ]= 431359146674415650192483804604013820046871362991717344460529930094743 , b[ 131 ]= 32317006071311007300714876688669951960444102669715484032130345427524655138867890893197201411522913463688717960921898019494119559150490921095088153114595238430917879526391958105132610246680168721100623769878992086279439013427970142499684086838414384662780858972618286103380590313323129812665217304308298551185725279530831202262927288791667489665524828975835316251494571413845324777907723429645632839350685004937204290112692219610803658208162536381119789322744683965396551177026220302441328588733205988027191501203791070635763366486532848900689683920469279539856731884267603681355140705343537742880397334810765251583247 ,</text:p>
      <text:p text:style-name="P3">a[ 132 ]= 431359146674411515248247787158750407662192548991862480223436891862073 , b[ 132 ]= 32317006071311007300714876688669951960444102669715484032130345427524655138867890893197201411522913463688717960921898019494119559150490921095088153350325476181868857570274191096092738252733701011276069303743259960038879460765654246570266465883684969290735288482329214183666898806521252875604196309891607224212305609964666559252304515031304699747793386001474014582915199264323935093409788019188737272696623203531867488148171738554974725846663204757027426082919725966244330774850800857069221712457711392173950215179465740910841753824391836499602167641780447402929237948279776910575289703301753908590671615071789577724541 ,</text:p>
      <text:p text:style-name="P3">a[ 133 ]= 431359146674425507026932456602183575228678680053813257045686316500291 , b[ 133 ]= 32317006071311007300714876688669951960444102669715484032130345427524655138867890893197201411522913463688717960921898019494119559150490921095088153725745269401906348601948361624526357483414855178227504294721537616473671296995845989683243315499183353629777102952720662448318493084268076273907447304939269409790413905300337789572916694142900680978658968041612054063947587221137554804583945891749697638156436987862630081571319124964362029158701350531078533140493693406614857430273211317200194020923180196067135710725938892471137389523085688739600171016094187317128410341737213879309038744000448375042943094076307285884069 ,</text:p>
      <text:p text:style-name="P3">a[ 134 ]= 431359146674424685163909467486240198194199927830193250568799742417837 , b[ 134 ]= <text:soft-page-break/>32317006071311007300714876688669951960444102669715484032130345427524655138867890893197201411522913463688717960921898019494119559150490921095088152988169550296555293558448390526668326622727956976599330458672927814628870831713841395430441755040092246483963477597610906074459397840905806111025676620365289659254086843992539965587663904110060810067619815097914477692959047253800155525231921792379217855348978967775979885496976824166248556092162342296127058938274756626442614675827648480380238031460911766009943295274980827446822971339316436940646895558322701987361404737476637405794144059147990598546149127167263821794671 ,</text:p>
      <text:p text:style-name="P3">a[ 135 ]= 431359146674417370094963795723389067456629920414561137381777054897427 , b[ 135 ]= 32317006071311007300714876688669951960444102669715484032130345427524655138867890893197201411522913463688717960921898019494119559150490921095088153853245132551825708111253366809400007518299244575421777452612651946683983957331994567556268740971137117609507734610936028914988874582621203512736295773839705151340279807240765360669077278105145462359547612983054873733711829341524771887184090391076735142823139548113181521578030356977012191185844908141626778949280035849732910998840141119666232343819409068703938001259403880941706214110016220565728302569676214531811245092985746282991345828418895326322344671598576361760717 ,</text:p>
      <text:p text:style-name="P3">a[ 136 ]= 431359146674427645394051444197003240164894191246771107582699634791887 , b[ 136 ]= 32317006071311007300714876688669951960444102669715484032130345427524655138867890893197201411522913463688717960921898019494119559150490921095088154457920707617865099341060467267744010857263337578765841492138309090043153228990331430868966570296006709965130401943163652975019721710810030259278049786273847461487850031856998113711479946421954328678722450041423593474089849767298278825178826757927450820465939041678269032423602667987564470042899652337845442648988309285019269000155055431084398145601191990532954767769265777727580535487453256210846982958282789672633041416904649856156883081793156433158289052878280449767713 ,</text:p>
      <text:p text:style-name="P3">a[ 137 ]= 431359146674424700369144142646121205599268890217913465294275957723467 , b[ 137 ]= 32317006071311007300714876688669951960444102669715484032130345427524655138867890893197201411522913463688717960921898019494119559150490921095088154685180702568127846135197289045530830313772804963994481175180850451120716239032631664850671768344013241939382407349098943045953136054470232215275213857427008359159366211862786317818567459469768578404610058431034410969343727918995999897383187487376371547471433443568342142755271064948444582514382447111406942895585274002672732963460212200553898535529635818364620968020875686257937214923813627980946462640805420567873403014936657708882387843097727859066377530454237235234649 ,</text:p>
      <text:p text:style-name="P3">a[ 138 ]= 431359146674414004657555518618135160392545216489199021239443629010743 , b[ 138 ]= 32317006071311007300714876688669951960444102669715484032130345427524655138867890893197201411522913463688717960921898019494119559150490921095088153407711332109470308166571417067452886017206111566380062222899445056722966241272136179210558527962758387013564663915395411311355193298485611896810127982925454571693511654658588037701176035236242989721979548112764081565259995396561561662246158396855453871124096961592075587070514492523415384900869027347466222785049983750539250153346378344113469797587631218082268290324748611350342936802329584657339847365628909099659218288396901867886712733422652397478398991927075677371443 ,</text:p>
      <text:p text:style-name="P3">a[ 139 ]= 431359146674430215252127849871438441864966368708436299405310375497853 , b[ 139 ]= 3231700607131100730071487668866995196044410266971548403213034542752465513886789089319720141152291346368871796092189801949411955915049092109508815391060874611635<text:soft-page-break/>1531418823175464719726000137702334033727554125689962107576542628867340260786486447747945986042804828762191534494774690705242658519407858221296430337857143238873201543764021295059387454715844422273125912565117166185654815438351088380717481749613463435082869847208330822914084610666694186970847636895242125646456302953460976885916869799850736131981081274853613173624786838886898909913012459646944387438834939764907385015760953841908520092636227443806514924249 ,</text:p>
      <text:p text:style-name="P3">a[ 140 ]= 431359146674422282676954897020640598456271274166149866900775606713661 , b[ 140 ]= 32317006071311007300714876688669951960444102669715484032130345427524655138867890893197201411522913463688717960921898019494119559150490921095088153114595238430917879526391958105132610246680168721100623769878992086279439013427970142499684086838414384662780858972618286103380590313323129812665217304308298551185725279530831202262927288791667489665524828975835316251494571413845324777907723429645632839350685004937204290112692219610803658208162536381119789315796861484824364096532151857288195263840579525376543149698677822734859440451317153745901193891207560806764556158166880920168774734691430295837886409686133853091121 ,</text:p>
      <text:p text:style-name="P3">a[ 141 ]= 431359146674422241022468371821743573152080531164255602776531696702543 , b[ 141 ]= 32317006071311007300714876688669951960444102669715484032130345427524655138867890893197201411522913463688717960921898019494119559150490921095088152685876703038735540596158916571615722869881156453535245809408200384052657919950902134450567930652138917402127146178804250893713669041381024735723858048307441997556684184397193991382313801794431548469507181720526713727743939554434033306630461171845405342534963493626263326208592199370198173616372872385197094643193087080632802834688394923131667267517833442784383874722611013833715109318235340524740878421633457171302372870343528185382780446238287449078873093659582246463039 ,</text:p>
      <text:p text:style-name="P3">a[ 142 ]= 431359146674417663878030344902340309426699418144454796261250391006531 , b[ 142 ]= 32317006071311007300714876688669951960444102669715484032130345427524655138867890893197201411522913463688717960921898019494119559150490921095088153832733156870609297889503602281604511869147168947011649364536194993485127681720506067574294968165452573829089023171613828249848798475548016620995641981720302697737783319902590351599492424638663308774621124785002160139753232329629422051747834457168933404974878636882481947890225450928472529832919511301011921369285365111258741623872599910037719478738891730374306936816706056439244511521570923723058582479082386538554205364896570058888139855221428658504322877932253841478867 ,</text:p>
      <text:p text:style-name="P3">a[ 143 ]= 431359146674429394294322437377323059800679520429045684062142931789977 , b[ 143 ]= 32317006071311007300714876688669951960444102669715484032130345427524655138867890893197201411522913463688717960921898019494119559150490921095088153756206614669589912457947143202650133090525308326678277389644807424877425252371293862695888999705990570976668189104345919468959841318588371168040718555315799756007889492191524376708978015428637730100657501950640882477538466775050677600424637275421999737193491229157884030601103549038441686502396698399494811155160974194092648984997217836167592490817637456957594161303131618212573081711549104241975472543946195059389440794223505204062168846312543766706626332283841853164621 ,</text:p>
      <text:p text:style-name="P3">a[ 144 ]= 431359146674432070339216133039674095782983028359068870722366721865779 , b[ 144 ]= 32317006071311007300714876688669951960444102669715484032130345427524655138867890893197201411522913463688717960921898019494119559150490921095088154389843583118165347437684087194486855994249981377717024615528900441779804413073149916425656888225521289897319794639004509842116527420691517473337203838084116002124447311321722<text:soft-page-break/>049761235693250542942203931830350383165882744192843288127880847587051539761110207414303517063724983573238291191407297916811461992799038801060687343436707669348956079174220070121500963394301007720673367105746151245066920926514299660511808395435416584676526076277826003189617388730170766340847674301 ,</text:p>
      <text:p text:style-name="P3">a[ 145 ]= 431359146674431853889179454990954644034280157640747839692695932654491 , b[ 145 ]= 32317006071311007300714876688669951960444102669715484032130345427524655138867890893197201411522913463688717960921898019494119559150490921095088154773982257327602535756811239444705240545106760340700350946795363249226289378085769580595731053585101115989146754147642879138017751333840834699552835164940786713003133744322691364650592381583638236571843039874429464165804842308200643661055047634162202025644986554850722774812077700121300193222219869616650961858307668308311955456480293815585073719715470438722700571876235443940356424309923950764888254608036096195930495695078601808136119202981781931438833586953152976067443 ,</text:p>
      <text:p text:style-name="P3">a[ 146 ]= 431359146674420537301597493451625663941239813434683756603882885809789 , b[ 146 ]= 32317006071311007300714876688669951960444102669715484032130345427524655138867890893197201411522913463688717960921898019494119559150490921095088154029131289757831866684462461665077042819031806472964876710985932064267541046141331674294573961720782410075973987830561263320551342480355523047915984151525099006908814022838826068220807300077315209940208129053530689938085395160897728903290524027640520993415561767986733690191775095314837180116375945567958101092594636674123833787719250179021610663637538386457293163383067154198956087933401448472708411357615494462685308705016912755540968608026289553525462359151457325083621 ,</text:p>
      <text:p text:style-name="P3">a[ 147 ]= 431359146674419835552908663046937252365133006017138926090703298176609 , b[ 147 ]= 32317006071311007300714876688669951960444102669715484032130345427524655138867890893197201411522913463688717960921898019494119559150490921095088154121536247133678938499808154909564146479284663782790063790749450887725439594079865824220711343492207984296296259526435081242441543968522715458273227058257658120030216766394224536333802803985651204035327136414061709793734196023594600908012501153642383282213059276182005781500578619793579156595275172440058189540532546855163996528546185676218792307823160497848643972060955389943205900156868117863486728454726331822318142829245680031734940637588399843848907986507884463989021 ,</text:p>
      <text:p text:style-name="P3">a[ 148 ]= 431359146674421530138069822240080792021748308103499719065967073620651 , b[ 148 ]= 32317006071311007300714876688669951960444102669715484032130345427524655138867890893197201411522913463688717960921898019494119559150490921095088154365916339346747449299871612242945600945948244342562732024712865538727822329019571789287629781361173834506773988305640859672862678199684602332614106618902759313889000834880146994704938882299381164466895818259240154536373612591493435383251113248844282556435148497442804629135462356209916746931183791928863430295811338505106991054102623906908096757644085303103400972259339336982331236935068142929961217677746143235609838739268736222221455845835287134083704328558604023738193 ,</text:p>
      <text:p text:style-name="P3">a[ 149 ]= 431359146674431689692393504138673589689444334631492481797642571502637 , b[ 149 ]= 323170060713110073007148766886699519604441026697154840321303454275246551388678908931972014115229134636887179609218980194941195591504909210950881531099252147181346943074313877388538431432589556355273884042184972239397996425858027887457198090999974812109549322256047208428109758934022797487867426872361406300475232406388234600154911387487570657746424059273699419091386770619297217205423155756096383660240472391549525657933902632322748215465999313985832453302953490090534723897470591<text:soft-page-break/>60171980509444131869313787147999076134882811220397512658140087559904898488838685818467669255700093785392362827292368080732046896629628059 ,</text:p>
      <text:p text:style-name="P3">a[ 150 ]= 431359146674420436263924503337480354775037593988715677642010572967701 , b[ 150 ]= 32317006071311007300714876688669951960444102669715484032130345427524655138867890893197201411522913463688717960921898019494119559150490921095088153926349947025339457259409720752104471015948839379106490478374817636333865688429651112700828227507328521438703431090529708338932587348143950228397857210374706582371323674098888533970494033861672030462267765868717654285760250769304989350733713186548765313334327915075422550890799294242153300794416489991195711849209452415029755464697811827909330372327175669966817210246225747433067907529456297562167950575835053377645867729395868534259079500134185927797234491112011845007209 ,</text:p>
      <text:p text:style-name="P3">a[ 151 ]= 431359146674411835670515727303568456164826185257605748618580615647593 , b[ 151 ]= 32317006071311007300714876688669951960444102669715484032130345427524655138867890893197201411522913463688717960921898019494119559150490921095088154029131289757831866684462461665077042819031806472964876710985932064267541046141331674294573961720782410075973987830561263320551342480355523047915984151525099006908814022838826068220807300077315209940208129053530689938085395160897728903290524027640520993415561767986733690191775095314837180116375945567958101098132904003102907422185836531603712355303936293545044219121901200845659657779538412172280540696437803645291929258258956033465378933387188159430553142148694809740069 ,</text:p>
      <text:p text:style-name="P3">a[ 152 ]= 431359146674422984877750124548410509629471715618119541302211468388307 , b[ 152 ]= 32317006071311007300714876688669951960444102669715484032130345427524655138867890893197201411522913463688717960921898019494119559150490921095088154231353735337840395520922554936988876387754806892559538079146506934897789285208072820356439374719440743574311839613374405592711660946560869900709448719850993654701342612043572320731386779545343534465920179596847071553076590886048719707323241899373069021588476584249499582126670968030676127058089562764957606994671952970383713892024704263805825820764520488816565618320448827263344986416639532815700556759174274633413582457477271283767641978701413568054997806272647328182957 ,</text:p>
      <text:p text:style-name="P3">a[ 153 ]= 431359146674422860851980865077993427893144902252999459328536399846187 , b[ 153 ]= 32317006071311007300714876688669951960444102669715484032130345427524655138867890893197201411522913463688717960921898019494119559150490921095088153878467316674606931007280509407529974323763003708034891432546672264473775575018268964253761777037156238181741390628706759656521807325485710013549317570765380521070039650265118567733476760417581625797968893124759491406026583655478710256338694425120174350790481807498591656482575799183335814966814342266449106549731580988735969640944449896596017523518505667981267220401319727733635730249028471702109109495277012017776702741802727701481513938002207647485586692416208981655879 ,</text:p>
      <text:p text:style-name="P3">a[ 154 ]= 431359146674416548858011570499071227994287039131105215531163090166321 , b[ 154 ]= 32317006071311007300714876688669951960444102669715484032130345427524655138867890893197201411522913463688717960921898019494119559150490921095088154461417598528091841104702854760236313085532654111258438805526731075419184913741285881612477799611040788201060525858541093873269667713313670976977264187557734888917679365485217516309829668193238319135888671407318392364932309527329702831581845040217905374116629965400244224731153129723556161652444272598965054528518166313194340172980684559818211363085931998777654775156536113470446666315621957842169922498125579830406462192539219674325761642094267211243906484230112784792953 ,</text:p>
      <text:p text:style-name="P3"><text:soft-page-break/>a[ 155 ]= 431359146674411169535516107673655992516352778203222061175182351121189 , b[ 155 ]= 32317006071311007300714876688669951960444102669715484032130345427524655138867890893197201411522913463688717960921898019494119559150490921095088152657908493353586869850549041566336606305230681901216071429591226768406521730657135003688398370151054374677220252815010872281455266158081040524522805627311589101367725977655464034990608172187783370716249957502172625644569565856794827454850469094562194501188979834741114190692985094011922882759557759546827745068570193711243134122007461697344182089631287992207415343899546783993384901829623206671858716781758402364935431784764295982854252473242381828616906150251703775031777 ,</text:p>
      <text:p text:style-name="P3">a[ 156 ]= 431359146674420514328664303582662009136980807620112500318158931318139 , b[ 156 ]= 32317006071311007300714876688669951960444102669715484032130345427524655138867890893197201411522913463688717960921898019494119559150490921095088153223312399729690469802558826260972566536093037966436907486468745600718186183235386243104369451880450813501034769662201989163953211041205555420086210880025592331270334594045752018550851079525314874041640466952058039051983317113399130846956465263040916396640879490206807092995508945375000019661565596501413214656028954402600142248494269409293756088533974070771988303912591671693899575626144833730682872880089886192461392442474524646876953820845453506262609527534712989328203 ,</text:p>
      <text:p text:style-name="P3">a[ 157 ]= 431359146674417482697727601667802121927848768281576692881971392743047 , b[ 157 ]= 32317006071311007300714876688669951960444102669715484032130345427524655138867890893197201411522913463688717960921898019494119559150490921095088152503021628795272015867848839213861871200998762644952759651480302703420034656891317168043342532381116850312128782601377775349042897832192672555226127395637354518432903282351755324452619724195492622325180561541266592493399628434868372122131194640252288908808076892464847946770172184693474966858248663032118227782470733488092323940861187785720029610743623886785472183504239070262693476748709241029142967127240656520465645125294664646763349167545544238962905000333252962708813 ,</text:p>
      <text:p text:style-name="P3">a[ 158 ]= 431359146674418417482624144854127887499804134579421878529797083901721 , b[ 158 ]= 32317006071311007300714876688669951960444102669715484032130345427524655138867890893197201411522913463688717960921898019494119559150490921095088153977049090115052310038142101433854809485239391724827073651779478642892724760608236688012937924857561454724696604619493593704085086033365547914889838836272087984038962320546911497608014205686599127217952253752835056986117914049085098024111208796215805920185211542767406686926680771254778073774338824960563269120731014594517752879741445169119309104579521094693326969006390838189776513304583180659852951371450338630385097346968080766287389513155126932074464354684040464562033 ,</text:p>
      <text:p text:style-name="P3">a[ 159 ]= 431359146674415317716070063237074637189140407648570245170344814431979 , b[ 159 ]= 32317006071311007300714876688669951960444102669715484032130345427524655138867890893197201411522913463688717960921898019494119559150490921095088153455804469506320409720856861475931471550757237813354245958983539007794859674235580051991260188098369844863933665829125994779918725370403888591928213742445209327954288190700591624568774332237352025842055403212169147097543984308233796824465096863979727461298992296021177653460185672539108210456243630176503374865665462175081982924990007303414358226932878979347766619135994311333925675308323654818241090186406095263944382747693266523076106572330573278479673272407468043208291 ,</text:p>
      <text:p text:style-name="P3">a[ 160 ]= 431359146674426572719763797523981673639457472450524049180411543632557 , b[ 160 ]= <text:soft-page-break/>32317006071311007300714876688669951960444102669715484032130345427524655138867890893197201411522913463688717960921898019494119559150490921095088152605376413716947356313635379730832400198891450772535701418991392720340253283498213133608278951708245493848359484275148018347344065306832944010057731987094740771353061615994647879424798144517887871442310215265969830854491655335296018961088404879571850465307717315696529450549704827135260446639316081823173615973782664063975438747358297996479144692225530437567990850623486368720087223672836450937478341824034466673918036570531670493148686717590332757678142331817606123964743 ,</text:p>
      <text:p text:style-name="P3">a[ 161 ]= 431359146674423973358901902164608350749555281345867484348400714440149 , b[ 161 ]= 32317006071311007300714876688669951960444102669715484032130345427524655138867890893197201411522913463688717960921898019494119559150490921095088152727079885233234209022945263098030979605621450964272743415984219726355263010812645620416268638656130257215938619318095484260019270582070591620249906054325804907843886822989961661235438864041354651955330392704328299215144072216218518967282521786060328230508722887177875951972729650166018568298924680099071367115969873427244966572064056839513398973929778635365505507895382155139627398970497062987887222640766942413821191776773609947723486508356181094231504474534053056314693 ,</text:p>
      <text:p text:style-name="P3">a[ 162 ]= 431359146674429838872433282715008549763187862965371064517989178358009 , b[ 162 ]= 32317006071311007300714876688669951960444102669715484032130345427524655138867890893197201411522913463688717960921898019494119559150490921095088154402086866323832663154745509859705130719979701338573565362896326909063420074474161129958702369749798057696893667810958927458264764685993617673270001733820797256726564587670941407243863630880678662435455194229556368153752330217040571050519300316503339997748348761972216393630943584325088962847618562691247774591818422124896989699125149850475991427995699073928614301727942276754912386443365464479173604863513840561633255240737123201828822429450751938708179806426577534383091 ,</text:p>
      <text:p text:style-name="P3">a[ 163 ]= 431359146674423318938477312708215046521676261455978200474892737415599 , b[ 163 ]= 32317006071311007300714876688669951960444102669715484032130345427524655138867890893197201411522913463688717960921898019494119559150490921095088154771184704106172370072549841304752417486814210191539707608510242818384807733960827277707150829504668849986768309076067407500937358443232678370093604154415480206045125829836014231268136455027702027156915491776588916937753906864765091658667594057026187110990621852570368070314653155580138108761786855265800613552968528211386754167016896951894243813417773242622694392739215679605681092049307302365657125281639215198498783841737914313672328079390062984403502432739612343894507 ,</text:p>
      <text:p text:style-name="P3">a[ 164 ]= 431359146674421676173322989095230370452773380120133366449021466279371 , b[ 164 ]= 32317006071311007300714876688669951960444102669715484032130345427524655138867890893197201411522913463688717960921898019494119559150490921095088153941496432266733741361155185228351001864168272360367630002143361810771271355943856547014181267888710747289504035657683480618022802965068747371089954193121922778454033776026560421687730818087031775602554171692529386713583930450136658910958791548984224748651411331002245647337449260925916795926697017366337025977264592200416070795562124378712476706245488587498613381597078285606330256755853379003818392479836164110317219173511772432987054953339631881719472623000806443755493 ,</text:p>
      <text:p text:style-name="P3">a[ 165 ]= 431359146674418722929569886161682593936338692009213405082096333692819 , b[ 165 ]= 3231700607131100730071487668866995196044410266971548403213034542752465513886789089319720141152291346368871796092189801949411955915049092109508815292834239014484<text:soft-page-break/>7459736547084809959552682479629478567562919620484977227225580074468856566861573613700523591112711646817046193346351412633143190707672675642368079849256326799224325227907590029575471693743229855576058062716318590616992511584709776997037818509747654857091806832200946513979431731643506377604601138862119115085639529305002490706971263705329176088050261494025394558821832196402270963929127464660134938814547218360698989730980303158887908705075199800696353292961 ,</text:p>
      <text:p text:style-name="P3">a[ 166 ]= 431359146674427258997498686331564290977235095673004396133639180332993 , b[ 166 ]= 32317006071311007300714876688669951960444102669715484032130345427524655138867890893197201411522913463688717960921898019494119559150490921095088154771160408156909006064056953729363652080556056291600415063880537293991029939453581901444406452461666801806160745511956056412675705280086425190177910455497541197558457279375047449002446971682291797640172888701764047711573325618517413299644223274835424070703443870905637679484148064158899405083395970093005331971916242268091606562641983015419597864663578138599903591196411613077341885027690932916343643384916264354932355459848943084772117567284024523195697916193116289994707 ,</text:p>
      <text:p text:style-name="P3">a[ 167 ]= 431359146674432984928169613064251523290472868459807342064610251528657 , b[ 167 ]= 32317006071311007300714876688669951960444102669715484032130345427524655138867890893197201411522913463688717960921898019494119559150490921095088153660928087638992439432561412100689285401486879270838735833448186739196004972691795120538469790363835251039681625145929984014989642033135787032571352983645834884970884315852031078874705659790997687453802591752802378324862225375251658346601013345227348251541527908985603756023797149339665975105813292833328343631272360945641341632788127242636507788251316111392213539411559003182641895260228608791240303688496489815567605077167539910579321262722677943660155651523584921342459 ,</text:p>
      <text:p text:style-name="P3">a[ 168 ]= 431359146674426564985908180104342746941359769172316341212613331238669 , b[ 168 ]= 32317006071311007300714876688669951960444102669715484032130345427524655138867890893197201411522913463688717960921898019494119559150490921095088153315337226732687825568359549315522944777598529050128579961713330073765102987945977110252985434499906842228934536427916959850749630747646994953012496122437897374110735641847274372465246541925253318822724163704391625806348440560845868526125287026016465284278571493605984944435368226992278111505640765774153793490573667224513785435364499664117359462315746749784063085797198699404081451264229931132597485243047101670178467929990511404472235672952833580955236780237412353226591 ,</text:p>
      <text:p text:style-name="P3">a[ 169 ]= 431359146674430113894979736221991072922274491083243774380021631104517 , b[ 169 ]= 32317006071311007300714876688669951960444102669715484032130345427524655138867890893197201411522913463688717960921898019494119559150490921095088152503021628795272015867848839213861871200998762644952759651480302703420034656891317168043342532381116850312128782601377775349042897832192672555226127395637354518432903282351755324452619724195492622325180561541266592493399628434868372122131194640252288908808076892464847946770172184693474966858248663032118227783218343151012981876693135328025888889779277029880849929353299384506133784508452447207604273436035318810380173954707799826467847555328529129859404053647386403828297 ,</text:p>
      <text:p text:style-name="P3">a[ 170 ]= 431359146674419317938308728774875007392318528385719240032330609436881 , b[ 170 ]= 32317006071311007300714876688669951960444102669715484032130345427524655138867890893197201411522913463688717960921898019494119559150490921095088154713508680306743604047043809415658945099544764378688524979255671882447810877110174524951110297713408470729154990465510227028857459020859109495977880652221414061373832472067296<text:soft-page-break/>418510009563590565732162632602109161279849955196654077762021439605129278399146688921060711525762015208622262764653970798780451935947050989581912569022656744092248078000682598991105970262129978967556208311055857952822867945631771768028218990005724076696973023604983789447043631399039382568174846451 ,</text:p>
      <text:p text:style-name="P3">a[ 171 ]= 431359146674413361521750446402976013347933537832614510474812202418087 , b[ 171 ]= 32317006071311007300714876688669951960444102669715484032130345427524655138867890893197201411522913463688717960921898019494119559150490921095088152700393286871727989725335207694509238221088594633751250765384212522480905481776072087513864967173403756018080703961175875553563072054735462649601696251251234709326694653064229469358853480905096081210245480682986062812995359258144346553985338469339867764311377761107254932766266117278084896477228760125653120544036086298987211190366980241094829600919638067013707875815241269929247720950161974111353279744899113536517382887155063373921256453151442899957788674351637473625883 ,</text:p>
      <text:p text:style-name="P3">a[ 172 ]= 431359146674411339909749776040497547095680111526795919741123521767989 , b[ 172 ]= 32317006071311007300714876688669951960444102669715484032130345427524655138867890893197201411522913463688717960921898019494119559150490921095088154402086866323832663154745509859705130719979701338573565362896326909063420074474161129958702369749798057696893667810958927458264764685993617673270001733820797256726564587670941407243863630880678662435455194229556368153752330217040571050519300316503339997748348761972216393630943584325088962847618562691247774590529744904802578577937712185387984622061607211168877881349809311013848269206246434910750820285706570860646050004976410472206274669604053655563992664366177643776157 ,</text:p>
      <text:p text:style-name="P3">a[ 173 ]= 431359146674426349371393719347233857247027023117907869440077119266527 , b[ 173 ]= 32317006071311007300714876688669951960444102669715484032130345427524655138867890893197201411522913463688717960921898019494119559150490921095088153522861188240083142477857849184026539634069259337885255418034829228269931773422371681431312725213010314806723237928271201085880365432549555770993174032211381338624126344008656649612307992722312949428653462215996441067505804863300035735805858332226590474575691782420119969025777557277008534883093411736593870267731992746162986833480426192867389476911553917823421100428303818439056178232029575695043763758159831542058068241466647075832378329724051965830453668057047340699217 ,</text:p>
      <text:p text:style-name="P3">a[ 174 ]= 431359146674415508094379032939816931105956856073820138962486069125449 , b[ 174 ]= 32317006071311007300714876688669951960444102669715484032130345427524655138867890893197201411522913463688717960921898019494119559150490921095088154551566055154229419105076082959792193469674790491662343128672641162754736405275056160317027149003506493571157350844975494144830104499770726532914504989608781244191831753698289791745565781704131740774540357120230858512139281560698299814413604001929917699194682439589833213852730511614621844296219568282719560125273947785703469752323648136901039604646697556566271922439641698117963391018441265800995790441056292424024248257969732821221105974203706580750772825995622985731289 ,</text:p>
      <text:p text:style-name="P3">a[ 175 ]= 431359146674420588305949399622640927017753253287220435697026078062677 , b[ 175 ]= 323170060713110073007148766886699519604441026697154840321303454275246551388678908931972014115229134636887179609218980194941195591504909210950881542313537353378403955209225549369888763877548068925595380791465069348977892852080728203564393747194407435743118396133744055927116609465608699007094487198509936547013426120435723207313867795453435344659201795968470715530765908860487197073232418993730690215884765842494995821266709680306761270580895627649576069931883290386276026969548511<text:soft-page-break/>85789155635364565417692238122632824600078469601752697445649443648279622844143533128910375270536802192051084402666669354154409182052599373 ,</text:p>
      <text:p text:style-name="P3">a[ 176 ]= 431359146674411156821959036458298097774148299630615924269582099832753 , b[ 176 ]= 32317006071311007300714876688669951960444102669715484032130345427524655138867890893197201411522913463688717960921898019494119559150490921095088152487091483495137750282643498585730566641876446610173534170334090102881419984163651942702851216281761418026350407550851447849284550307786228202253310081363186541471862577817614390656108104540912926557960717968282232905889438889947896062645154405582860647847183672699685315607206804953709760461298322714458629193325257639450354048355791481997728311179306204758799307136600487687273876099653892710123518147871578685301779163152642440583612995074114561907822513091566397870491 ,</text:p>
      <text:p text:style-name="P3">a[ 177 ]= 431359146674416862167607761016050680769454529363684503099739351898771 , b[ 177 ]= 32317006071311007300714876688669951960444102669715484032130345427524655138867890893197201411522913463688717960921898019494119559150490921095088152805191357294324642485513640812678548668958013444911778509109577933000794221091747121533039493737666943177156151038556671245224614372440607459288498136273741410933973644571487882176678277971086712919799924575196586610072663707812727418221367606589258554770003943654799787445243310501740331090763687047573689813166701513725101025476367963595146117018688373229639175173548889480124172214627262852006101285419397758625627475316603224992431893066028934246491726813219563874207 ,</text:p>
      <text:p text:style-name="P3">a[ 178 ]= 431359146674417598258570721569962682878284276758156437398725034770817 , b[ 178 ]= 32317006071311007300714876688669951960444102669715484032130345427524655138867890893197201411522913463688717960921898019494119559150490921095088154165358257883151578044412683929595226781845076728353031899867270756722837493480019405745379621039071880529941451717573940690807540180842792512462009271749226596870023250358521829152630301710914433735039798472066535651914420933451012547085453489889642569236595342208441516515915165836429703421525457246571488029270655392460694021641638139064016838891725855638520109987057415435382410508573993945643928349159657552720396706291255327567305883128284590624771516750522008511541 ,</text:p>
      <text:p text:style-name="P3">a[ 179 ]= 431359146674411762691527593412929412867874171718487169618801349415873 , b[ 179 ]= 32317006071311007300714876688669951960444102669715484032130345427524655138867890893197201411522913463688717960921898019494119559150490921095088152775238168554359132246034850898137298413016365267552403233045662974383012220556032750104654328823315064096611314486865908721989148060091738448975270513682271521384194865168771814678141859044422783648672029143650682747944802191738199634231982624320707321961579182761177721077370236028262949709413255591829835714084218231801897987386162302595772573926215640979890080421102024223597168144763873670509513062752646685906448364425713325889792739177162832641243854815029044951159 ,</text:p>
      <text:p text:style-name="P3">a[ 180 ]= 431359146674429894749751351230420277145138208310650827584849698041277 , b[ 180 ]= 32317006071311007300714876688669951960444102669715484032130345427524655138867890893197201411522913463688717960921898019494119559150490921095088154441847274064575232210529215867617535080756623424582740694211666527782187134847316688855099487683517769718959324634771095366632529221848183223802438919095548713047099804723298323552794873799324303118713492620007802759795613205817090157833525981623451010001855677666589310576920356223017670761724972560628909641233939670175762530972829630409533737996035467155700032768355415009416545574355909492949460313626929684802400849688991765642363966469565249098442597750031780497893 ,</text:p>
      <text:p text:style-name="P3"><text:soft-page-break/>a[ 181 ]= 431359146674416210152038443861491537735986666014318920313726266018107 , b[ 181 ]= 32317006071311007300714876688669951960444102669715484032130345427524655138867890893197201411522913463688717960921898019494119559150490921095088154224739765728996274466881057566549001612500635657399129225947017837451551044958417083624449996018159962916318521475629293814673552884238140408243081592689071287868693552380211255203617634276887968907665703861560771680427745931582762612987911794718356180395520529936986253691067196937259454973274023012434145119649819873003679089881196537951371468598469247469597953363555642755352545534156925621048637404655679791192306432920383623477969355569940423818142721468099448273951 ,</text:p>
      <text:p text:style-name="P3">a[ 182 ]= 431359146674423399032877511796688128538322947409570005904262070854603 , b[ 182 ]= 32317006071311007300714876688669951960444102669715484032130345427524655138867890893197201411522913463688717960921898019494119559150490921095088152683973057566452724425959049117107408610016088503053724241135939915599230154130828700987729931292349866146332618160289151816298235010864597010329457467375211304034568330660301441860148282911670041476731986514962912548814016574627844166770733313908190747843408682619244989422255179155618981596165136036751556513254260984939840818792292501605550026180783813173970679379168034642650954426546006668369496088494905138498862809111759299166659906470554396598932624154210045298177 ,</text:p>
      <text:p text:style-name="P3">a[ 183 ]= 431359146674411736666019874347542059808050992738056956170465973840249 , b[ 183 ]= 32317006071311007300714876688669951960444102669715484032130345427524655138867890893197201411522913463688717960921898019494119559150490921095088154690741804323269175575960397040358628974852941450773750072025309017352546876001939111072792764984771335875487362297559118348566758856949705602145004578444458324292651891044144615912413119026378346637024217704133238060073015450503785817921813392129821518409973665060994373790123543934455692755214883747850116454485174148677216324145537310767548566887204067464432513771848037849926078869225873153694645676329611977408751068735146610503284285910488632182461886466911259290203 ,</text:p>
      <text:p text:style-name="P3">a[ 184 ]= 431359146674417498915737239571832260947413177712948908298692610548653 , b[ 184 ]= 32317006071311007300714876688669951960444102669715484032130345427524655138867890893197201411522913463688717960921898019494119559150490921095088153134183852345129965215847742922557931098944976371341733768956973848112863965409337937943739415928863944969728309434927662790348028824823713709609911996122599925111546999111978167225522777592820872902247911744472404635228316395727717549698635493722578269903862717757364581808777436931219062145670530535643493388430755551058747184386887440768165914608777632301224282745007334942738147650019537233767521379626839390207205840246682285802690900450078725218409421865508779893257 ,</text:p>
      <text:p text:style-name="P3">a[ 185 ]= 431359146674418726685172374840437186557357606709645628373278391620097 , b[ 185 ]= 32317006071311007300714876688669951960444102669715484032130345427524655138867890893197201411522913463688717960921898019494119559150490921095088154258468299132621005680830541524610581112919882851813275477194132600008417655666120562356843106742571179966213064116063364877281558782982916491705963126603498237232316641656548361017373145308353961567627078875491339733372058185269001120099951267945029724018973864334294140450313271988992662998870007315840041555641230003659571812075141497178020095872212384143324374786519361071988887382136158749211211752392355729084484906165568822805714273623327867947359167607496666693879 ,</text:p>
      <text:p text:style-name="P3">a[ 186 ]= 431359146674429448977045605079388014418387604413055846368644971958369 , b[ 186 ]= <text:soft-page-break/>32317006071311007300714876688669951960444102669715484032130345427524655138867890893197201411522913463688717960921898019494119559150490921095088153175522899030509318407587173461821791844601899754279433970343235353017499484920328186724755108571738166910969062631939991210535859085773994804997847147042390020951977103219009287748527284007807847161855552303842266763635096248830569652952815577236006222848618983380160012169533041817553668032938351684053919812534721348327265871362758509071040380731503804741900118785875095786355231290895937947752697144577641812227509607115386385568990731213059073938285621900238869351013 ,</text:p>
      <text:p text:style-name="P3">a[ 187 ]= 431359146674416139351418500412563294017777504312816648022537956537963 , b[ 187 ]= 32317006071311007300714876688669951960444102669715484032130345427524655138867890893197201411522913463688717960921898019494119559150490921095088153362383555801276414985294294761537009378655481551146959203466111716670798874711534485770300792325601481326269085350792759287925363676006706067762979082864737136145907203742480597713995099358401608907147292037056611536337671777046704676708707220464434167223055503737560457327848610915743361432059516015325670923051630526962333639697197304645266169144273149679136411800743513924960094520449270489987986154460199696274329298308831755407029121577226983657615391088804875140009 ,</text:p>
      <text:p text:style-name="P3">a[ 188 ]= 431359146674414347559499846032737128805539739237289689831062345219571 , b[ 188 ]= 32317006071311007300714876688669951960444102669715484032130345427524655138867890893197201411522913463688717960921898019494119559150490921095088152778222405293879185746346956229460226455982182862952936071991492956350176180174543394491456526190909496337523193404428718105899060870541521890620047989345694306646711963217234584969544399099239260576570618248568191415096767266560178646845439556837573327520954702094776297658552750882696867235196551530313135239198494350649152035615962996559643850104325094928545371946748682764743291089271532048360990138692572621846231940688958793601584355968305470936291552140519609941449 ,</text:p>
      <text:p text:style-name="P3">a[ 189 ]= 431359146674411871583447398321846776587260832049618402447972601256751 , b[ 189 ]= 32317006071311007300714876688669951960444102669715484032130345427524655138867890893197201411522913463688717960921898019494119559150490921095088152856714176449689219730741504742206942920054015416252841967862380690659423701698999604609795616376103242014639671468688414486533336811825806254172345608523037234243402345486393633875117809282823108560052839915653529058713067987614574745275103037491364018499591110462688334047444717214752227881848441669652712564902260732799775845249535479713389909031608794782980077123867988744601600417463384481512071792145238381918355208989138589898882190550857428746581602352428617180553 ,</text:p>
      <text:p text:style-name="P3">a[ 190 ]= 431359146674420699910644603048547060523274288189852478106938750592409 , b[ 190 ]= 32317006071311007300714876688669951960444102669715484032130345427524655138867890893197201411522913463688717960921898019494119559150490921095088153926349947025339457259409720752104471015948839379106490478374817636333865688429651112700828227507328521438703431090529708338932587348143950228397857210374706582371323674098888533970494033861672030462267765868717654285760250769304989350733713186548765313334327915075422550890799294242153300794416489991195711851692144540174895645211584842980061137543976732703842452766139436914896882171535957538611808340308290857112863054538454090796569413751130466980139919589648938807131 ,</text:p>
      <text:p text:style-name="P3">a[ 191 ]= 431359146674418643392367186305616249475428278077743003871187787824583 , b[ 191 ]= 3231700607131100730071487668866995196044410266971548403213034542752465513886789089319720141152291346368871796092189801949411955915049092109508815299056657226075<text:soft-page-break/>4283573335076369731000611621452942375846881154805605528722394048407393251037444324510390029567987381226094403921541452479689035791407162240834579281176137020814908869059889650104213955247231910442741310758801346644268675203738825887469133427796653671919117190001263366843146003693873243794558016319190866885762417230751844329773668177460347954673799126006124960253007573294487750992197596109885652822184169082306394268759982124591231278213590353884649852397 ,</text:p>
      <text:p text:style-name="P3">a[ 192 ]= 431359146674431986597912629548932325695083328016200709934407999047401 , b[ 192 ]= 32317006071311007300714876688669951960444102669715484032130345427524655138867890893197201411522913463688717960921898019494119559150490921095088152605376413716947356313635379730832400198891450772535701418991392720340253283498213133608278951708245493848359484275148018347344065306832944010057731987094740771353061615994647879424798144517887871442310215265969830854491655335296018961088404879571850465307717315696529450549704827135260446639316081823173615971974233089029955269950290654891538271924624193896795377403539277271780261479332192372049039266541396597106180211980676883264064568015228818881035175559309814290407 ,</text:p>
      <text:p text:style-name="P3">a[ 193 ]= 431359146674427008395411450617471581672591312015519588768206468180241 , b[ 193 ]= 32317006071311007300714876688669951960444102669715484032130345427524655138867890893197201411522913463688717960921898019494119559150490921095088153595523401863266236253838413474599235867793032282636197473036720509846338420216808588443409466942417978228319164353237977966638478293090141879357215375005975601957752295782810746139515577074971499108713821706426970998017740865884947474083305533241732196490261258793957009506801561258496799347264054845086219370907819047935820625242108575355593084698457575188265769762489954420056315800244617806484498704924893753496474779850091646203859170279417411724071138648443410867299 ,</text:p>
      <text:p text:style-name="P3">a[ 194 ]= 431359146674412073107761589350220404043633760898947262017510192524707 , b[ 194 ]= 32317006071311007300714876688669951960444102669715484032130345427524655138867890893197201411522913463688717960921898019494119559150490921095088152928342390144847459736547084809959552682479629478567562919620484977227225580074468856566861573613700523591112711646817046193346351412633143190707672675642368079849256326799224325227907590029575471693743229855576058062716318590616992511584709776997037818509747654857091806832200946513979431731643506377604601139765215506461700679199493115930274224702906105176066433398333865503513632536620281574678033503235871215724899198560802549952731956363657945696479755999582288348623 ,</text:p>
      <text:p text:style-name="P3">a[ 195 ]= 431359146674416910749475031384927766219053552541683642533586860857289 , b[ 195 ]= 32317006071311007300714876688669951960444102669715484032130345427524655138867890893197201411522913463688717960921898019494119559150490921095088154258468299132621005680830541524610581112919882851813275477194132600008417655666120562356843106742571179966213064116063364877281558782982916491705963126603498237232316641656548361017373145308353961567627078875491339733372058185269001120099951267945029724018973864334294140450313271988992662998870007315840041558630655641821864672421670450516742767516509380519626320493500092084431164261580806694771148176847302667166907556804687774537503303893293620387622695327759552215429 ,</text:p>
      <text:p text:style-name="P3">a[ 196 ]= 431359146674426897676340567487926025879077273502185146864922654565141 , b[ 196 ]= 32317006071311007300714876688669951960444102669715484032130345427524655138867890893197201411522913463688717960921898019494119559150490921095088152988169550296555293558448390526668326622727956976599330458672927814628870831713841395430441755040092246483963477597610906074459397840905806111025676620365289659254086843992539<text:soft-page-break/>965587663904110060810067619815097914477692959047253800155525231921792379217855348978967775979885496976824166248556092162342296127058943773182654157863883012850617680171051359504737561804054091909311263507319370089855798652255420142057634587095624117537383606624721733189971855412143008204988586907 ,</text:p>
      <text:p text:style-name="P3">a[ 197 ]= 431359146674429944798189842734691850291003506310828581205539914324717 , b[ 197 ]= 32317006071311007300714876688669951960444102669715484032130345427524655138867890893197201411522913463688717960921898019494119559150490921095088152987701009663886114033554301659622482642318975170131167983418120583784975447362310771252378317203865247889885671920269086823746822604397854162234833551649201974757707922950145838144471575983642703345437809967437659351962699192482080504343722749714294502033053585255450056772583498633054944183193674762429163599761980785198416807217351072059215556401344381870819791484889532916955318621468628439882957899734536007641073792081119205365197250434220375366171976567311443517909 ,</text:p>
      <text:p text:style-name="P3">a[ 198 ]= 431359146674412181898837781283305466425203113688481775433923036027067 , b[ 198 ]= 32317006071311007300714876688669951960444102669715484032130345427524655138867890893197201411522913463688717960921898019494119559150490921095088153595523401863266236253838413474599235867793032282636197473036720509846338420216808588443409466942417978228319164353237977966638478293090141879357215375005975601957752295782810746139515577074971499108713821706426970998017740865884947474083305533241732196490261258793957009506801561258496799347264054845086219361220525639932289372322795348968139621241068879008197830692379648908695562050365592308943617006052972893544175378523503287689488732078105031856867347406065295014849 ,</text:p>
      <text:p text:style-name="P3">a[ 199 ]= 431359146674410557697631583121283066660074192212284564996717480795951 , b[ 199 ]= 32317006071311007300714876688669951960444102669715484032130345427524655138867890893197201411522913463688717960921898019494119559150490921095088154690741804323269175575960397040358628974852941450773750072025309017352546876001939111072792764984771335875487362297559118348566758856949705602145004578444458324292651891044144615912413119026378346637024217704133238060073015450503785817921813392129821518409973665060994373790123543934455692755214883747850116454419459532294823068389163107965842109730279650117228663501081764030728094569748803240053763328668021559545813124754377448337848680394919864629602352599674599157983 ,</text:p>
      <text:p text:style-name="P3">a[ 200 ]= 431359146674415522278937502128728613029116947973173127879014239495999 , b[ 200 ]= 32317006071311007300714876688669951960444102669715484032130345427524655138867890893197201411522913463688717960921898019494119559150490921095088153438948118270518052784903016599834878784094417530373426475876246799344716674155715794336060907955332760766081160257375395456338062598389863193335973184540229157227855566668952328900043825065500695557013476468867044672140977865188036274384548322675365473644318455388691825505897825511986438078349970059270635441099065287700380287361272834636927075104500878381363733975547415767170399603054439593468808838143216442409087929650681908493241834244934344702305792066086104096501 ,</text:p>
      <text:p text:style-name="P3">a[ 201 ]= 431359146674423637759670209157028948153343314968206548466078831761711 , b[ 201 ]= 323170060713110073007148766886699519604441026697154840321303454275246551388678908931972014115229134636887179609218980194941195591504909210950881545056519751688118385886920244496931414797865196180529471631989695888000233087245315219204158194222858759953271867800793967327623176720339046812351476694696086562270495684042807790833416469369701705263147763674400760298465187559398649046978893308624368818238523226100861288780504952814069446010979501537430308747988905330278254118484359<text:soft-page-break/>32221164884760935657017453325128052403769539796017768384482284043713517481678435812735266746376147412290402609857143696062250773818164259 ,</text:p>
      <text:p text:style-name="P3">a[ 202 ]= 431359146674420432591353576429587684204318727724174903165178995399461 , b[ 202 ]= 32317006071311007300714876688669951960444102669715484032130345427524655138867890893197201411522913463688717960921898019494119559150490921095088154000511220718072110359401448444163992815800707950111782537029539773006362256321127735124253032789962557603786029421166847365434700374808357537560199776406137669332399189314693096290742740626141741325346735075842615471614049665371655840753137648733986620967778860163124705613987438914069582215304748261156934023629431418930689134416665514458843758121062835121754100527950617311608162915420449102827989107434413920916473501511156562069059872106387594270982357752986372915693 ,</text:p>
      <text:p text:style-name="P3">a[ 203 ]= 431359146674428099192639103676855468934957369628063396524926706838023 , b[ 203 ]= 32317006071311007300714876688669951960444102669715484032130345427524655138867890893197201411522913463688717960921898019494119559150490921095088154637831860007461251760135030324527364065032481463612934404520818713412018027563170253223780887312653814840887730667841451903862366895935923471074444710115973252169353734168471073859287585001327918658745399670282154719565569018861273321769487518007937618856003587923177156414870739150294092382856234938966196446620164832052840560454732914798882509828896287499709357963887384573720533375386665826689487361226117331804902051427748326852998920225475941572130043750830501953207 ,</text:p>
      <text:p text:style-name="P3">a[ 204 ]= 431359146674427116097029515772701699950965470573122492931253046444961 , b[ 204 ]= 32317006071311007300714876688669951960444102669715484032130345427524655138867890893197201411522913463688717960921898019494119559150490921095088152904335331287724498525596367877126276040642921387600796784869125794931636562755719758241878385261062411112011462866828070633547226115790411800011531691979996279805521915837366132478551101350247588776408154448981586442958459828083647119077531601140356157984544181635423766345067683745909291840482334898845971085878403100282998298928044093425120070763991760948557155399010337508454239667751321384782766540401575843464552720851844609695532704553582598096828241307774203635479 ,</text:p>
      <text:p text:style-name="P3">a[ 205 ]= 431359146674411081864874108366448545385988182195234786265625446531107 , b[ 205 ]= 32317006071311007300714876688669951960444102669715484032130345427524655138867890893197201411522913463688717960921898019494119559150490921095088152934112880561140273120345324694586243047176665329982369707047461233452733257166139430437507324468711983553580787819630524247891158102894492197184223616143865420503759299199343169848040630259050067166084315152106039857489202751492666765960465303821516245383578116744432382334081034820015211213465325626257268815005922266650113181803803497614964430712978628766464426552665954729848866999005176264742913455931722679215706479013129727927908281756783762543411418600432677366451 ,</text:p>
      <text:p text:style-name="P3">a[ 206 ]= 431359146674411871043057167918745422588759565658106561670335280328651 , b[ 206 ]= 32317006071311007300714876688669951960444102669715484032130345427524655138867890893197201411522913463688717960921898019494119559150490921095088152744719838680278301337576858203213801403648444410533698159934347728705677449928571465821790136476561971443576972602827897492153156563558773150123067673046027480857015124507924843978049707872555908511313512903767731492552206187052496306245405126307728655616046584073309099427069802888615293123206270098887164151619435551472585951255059119067780182187420977534779100017493443536459347399346832082576260663734686959074514768963667752625112948590544220740376690355946166104397 ,</text:p>
      <text:p text:style-name="P3"><text:soft-page-break/>a[ 207 ]= 431359146674418438660193917114410488724661845124061134237082736439883 , b[ 207 ]= 32317006071311007300714876688669951960444102669715484032130345427524655138867890893197201411522913463688717960921898019494119559150490921095088154682120338520915918741607469311323103997864771815450831696395276492719715189958085508173937189575012392065900162597320566918823376666162188809894596125154043347305287655703294296428004538266000048990917979691665645393492608272597962026496502103995114682345566915018588341571839263640796060129641044298165094434034223433338814873227838615090852725689197230668689461400768538060610553614954740406108905672547054168993767371940250838460631519311731781908038814798388302438973 ,</text:p>
      <text:p text:style-name="P3">a[ 208 ]= 431359146674427158789775938516705476501135997465629075340979849041989 , b[ 208 ]= 32317006071311007300714876688669951960444102669715484032130345427524655138867890893197201411522913463688717960921898019494119559150490921095088154191598967728176821681396126401934578282002099104750555659977348955770434927131242080949607915742132221308458652902659515615547494466436684552657440428967906611065212594205368407448419166689025268491905699777337124445968085686579697361925155880118670857973064557155867648766347163784106403926466751239261090879509286109857172171070950226518942561809118490902253873073845746179844162685197863163923397603263940252137153207916612838166978380967020863487230566317184551491551 ,</text:p>
      <text:p text:style-name="P3">a[ 209 ]= 431359146674427947725715101681405195003877455103708967205805721641309 , b[ 209 ]= 32317006071311007300714876688669951960444102669715484032130345427524655138867890893197201411522913463688717960921898019494119559150490921095088152764091866740432116880688010902654630006355197185700904441221051810878776503216283009260122823470773630419866243824669239844892854010178799681902642880994439626152374283838917729493192260716182267550074608857165425141550368864835297611258335866367056499450450578993732936832725803450135118178487264267593565478978682104121207086036588032481926137687706774791183893801816061594006391387877919903363390233291337566749314991797975332476416063368276383455274322176253447563001 ,</text:p>
      <text:p text:style-name="P3">a[ 210 ]= 431359146674411339432341131821124790726994563765058381460012562321057 , b[ 210 ]= 32317006071311007300714876688669951960444102669715484032130345427524655138867890893197201411522913463688717960921898019494119559150490921095088154172125128071109861721743349577055113691165939510790123477385212199947219401622692770315013077329626265194385305793113463940568488526632358981231148768410988144492385223418895672438958778874156042906794648081816169277737011119759005790528576148021859797697152829545145030737622208695491058695071571584555414380640119875650638932733820094823053883638747559052434276270028459217909420148805448654068577102140898184379297071715850479108906692418347557933200267301206612801731 ,</text:p>
      <text:p text:style-name="P3">a[ 211 ]= 431359146674425910819921891322026322642728235197752268530704333074827 , b[ 211 ]= 32317006071311007300714876688669951960444102669715484032130345427524655138867890893197201411522913463688717960921898019494119559150490921095088152934112880561140273120345324694586243047176665329982369707047461233452733257166139430437507324468711983553580787819630524247891158102894492197184223616143865420503759299199343169848040630259050067166084315152106039857489202751492666765960465303821516245383578116744432382334081034820015211213465325626257268814040653977165371648699364915067180946869048900203287891295000351159110796625448368910939530711750440543334098292657155841785706703984079976282953602214666261496173 ,</text:p>
      <text:p text:style-name="P3">a[ 212 ]= 431359146674414925707625049577968026418722676744380733318471138774727 , b[ 212 ]= <text:soft-page-break/>32317006071311007300714876688669951960444102669715484032130345427524655138867890893197201411522913463688717960921898019494119559150490921095088153701343719530494075829289914167017638727346050609555963140679043139884349732910049645111152319420944127894358521493071308920899501725339931644080179702774790304092307637508567759535775844334941702372213936280807592711002886056732679485029441408393233708015971024253750373777925217084060127994238651824040325256510101122824226438875569711541825769786281268824401809746025330833055269246687562259793098515175174832303313471714930125026466028861192323895658453227361617013703 ,</text:p>
      <text:p text:style-name="P3">a[ 213 ]= 431359146674421765847820748961605490578359017395085520228413722642869 , b[ 213 ]= 32317006071311007300714876688669951960444102669715484032130345427524655138867890893197201411522913463688717960921898019494119559150490921095088153941496432266733741361155185228351001864168272360367630002143361810771271355943856547014181267888710747289504035657683480618022802965068747371089954193121922778454033776026560421687730818087031775602554171692529386713583930450136658910958791548984224748651411331002245647337449260925916795926697017366337025984996821482829094352153648896521945333813405703647159196511105542296265348173731806778833953546742492246868397802416681135059809277981267855227392320879197541735411 ,</text:p>
      <text:p text:style-name="P3">a[ 214 ]= 431359146674415154439253721158430379143082954999045336299018762743451 , b[ 214 ]= 32317006071311007300714876688669951960444102669715484032130345427524655138867890893197201411522913463688717960921898019494119559150490921095088153910608746116351531418823175464719726000137702334033727554125689962107576542628867340260786486447747945986042804828762191534494774690705242658519407858221296430337857143238873201543764021295059387454715844422273125912565117166185654815438351088380717481749613463435082869847208330822914084610666694186970847640496623769104517713665832079722851193814874862161427385723055992839915099242637280613577570358701330182940756814233090659106583217498395998637517001442039588893207 ,</text:p>
      <text:p text:style-name="P3">a[ 215 ]= 431359146674432580633382725552076577059558799337513071484571252727267 , b[ 215 ]= 32317006071311007300714876688669951960444102669715484032130345427524655138867890893197201411522913463688717960921898019494119559150490921095088152758378910481769908544779178401413835499533373000114561249063030997835756520061908777789448132141204520662864689702980558464634323213201286330643116602513895076428107253849838278988337788686602729475019826675324890611552333349587806137625423650147093327701117976465233078505861244134671546712854971712851946525945863588792260795092099986675930009210588124333228124652171362460550211248678460256733601918225477300617737868561453445678792529743540481828060087249228538996437 ,</text:p>
      <text:p text:style-name="P3">a[ 216 ]= 431359146674420347756435800879831214839406671513814040518058389670837 , b[ 216 ]= 32317006071311007300714876688669951960444102669715484032130345427524655138867890893197201411522913463688717960921898019494119559150490921095088154695353956434681986802469158806926656256423135177463809445963658082004229416871987269978692311294370860674893884166168562614179796645209688716640958787677358746049414257657599536513102791378485237720665579261869930842845997528371099450669053341364206805497013877294617458839541845052672894960610310853520121687310778474697574251156160892332765335301134356363858925569625768458168815525416949054051953492953735820764786455411299559261626985921541907065348731642066955797451 ,</text:p>
      <text:p text:style-name="P3">a[ 217 ]= 431359146674427882551100039211621144182075911275181132077542408416443 , b[ 217 ]= 3231700607131100730071487668866995196044410266971548403213034542752465513886789089319720141152291346368871796092189801949411955915049092109508815468212033852091<text:soft-page-break/>5918741607469311323103997864771815450831696395276492719715189958085508173937189575012392065900162597320566918823376666162188809894596125154043347305287655703294296428004538266000048990917979691665645393492608272597962026496502103995114682345566915018588341571839263640796060129641044298165094439268684288242337735537750902012558010009038131018171481800447868391815282601249548894991555835400755602039315873019645236001799206839592391229345457114974885609391 ,</text:p>
      <text:p text:style-name="P3">a[ 218 ]= 431359146674430920418766618805276281249631849422177982297844631196101 , b[ 218 ]= 32317006071311007300714876688669951960444102669715484032130345427524655138867890893197201411522913463688717960921898019494119559150490921095088152487091483495137750282643498585730566641876446610173534170334090102881419984163651942702851216281761418026350407550851447849284550307786228202253310081363186541471862577817614390656108104540912926557960717968282232905889438889947896062645154405582860647847183672699685315607206804953709760461298322714458629193540803892690691049340438833749235181341890671100295406153332185356236162234057466706364412891330599230043149380901916642681408968334576899069860534639566064288869 ,</text:p>
      <text:p text:style-name="P3">a[ 219 ]= 431359146674415556681863950227184674650256928391502707667282517049677 , b[ 219 ]= 32317006071311007300714876688669951960444102669715484032130345427524655138867890893197201411522913463688717960921898019494119559150490921095088153393539032482914405490282732640331242997258810961514123585357746181524721914747156211724432258114938643439438801011053267479394482201548288240154299359946004329588060948962145143580445326571184247032082512840962933921395665380502625542488526713107440968052040684689135524704079289737244332279496994399840795036105052979162063343857094201274415774176736418537939592683284362107348156287735546324499828681830100857315878591596803474223633077723443758716808801203363862593487 ,</text:p>
      <text:p text:style-name="P3">a[ 220 ]= 431359146674424138854506089342396192208351354744341896608571732236267 , b[ 220 ]= 32317006071311007300714876688669951960444102669715484032130345427524655138867890893197201411522913463688717960921898019494119559150490921095088153315337226732687825568359549315522944777598529050128579961713330073765102987945977110252985434499906842228934536427916959850749630747646994953012496122437897374110735641847274372465246541925253318822724163704391625806348440560845868526125287026016465284278571493605984944435368226992278111505640765774153793482896356457459886055918801348440791962544446390830321920082260927623245142531173052510032169320175391642479936692536031431556965789847758877413608924419017503287523 ,</text:p>
      <text:p text:style-name="P3">a[ 221 ]= 431359146674421027097883918914948582387044990511149122131480720475933 , b[ 221 ]= 32317006071311007300714876688669951960444102669715484032130345427524655138867890893197201411522913463688717960921898019494119559150490921095088152757832912048949194716618478907116665616791848165030416113667329249936460024174183965954682977970263849416802294472436122292059001344662779601121050050818949457732563596933076243321911607704222010079222713170584977285185036981780108919755573470926380186422022790494527075205167162856147877124444886925885284458672005589686089235929998414575961598456413021923498934286174415423972733947143531170518555004859137356738636520817815753256117865854799930325356371161420404065573 ,</text:p>
      <text:p text:style-name="P3">a[ 222 ]= 431359146674410756366080230952739210502790039467616538950011526517877 , b[ 222 ]= 32317006071311007300714876688669951960444102669715484032130345427524655138867890893197201411522913463688717960921898019494119559150490921095088152866111888189757248952311836184447098513733750506263165361655699280973299661219776611890531361969681195810439873247219509634217386115468196964895867863789651969281220947201775<text:soft-page-break/>120247406299800746568540086538786603143950482815593750290489100672971072461593707474383430664984097656150523567316562297415213491109706314434269340739676503709422990451201483743376637998127468346306088793259138981868641548238448515104410776185506818568265967532302987182461720122407356294791737547 ,</text:p>
      <text:p text:style-name="P3">a[ 223 ]= 431359146674417188766684011709096959500556876308849634087068221325199 , b[ 223 ]= 32317006071311007300714876688669951960444102669715484032130345427524655138867890893197201411522913463688717960921898019494119559150490921095088154410511645811524309887805122913455533208726018340677619628717507231158448626849340408076559269022349349161844121285144455921308997926477508276286239828073349240605880504091572345136526852518818314344931482230926839927992678778249663745414343492700482784853003760049808005953307579881058050079933174772833534005816519333517886850992006692510431930521982110638535745099656561938792342321828470418567301042524812822696843797388594361347268899297624923417136849703602741908993 ,</text:p>
      <text:p text:style-name="P3">a[ 224 ]= 431359146674427330343258740504919323213971559365733887334712102979003 , b[ 224 ]= 32317006071311007300714876688669951960444102669715484032130345427524655138867890893197201411522913463688717960921898019494119559150490921095088153771710457652024362693340672927139633845753314077066340648719839739956724111277683223146841923931576136842671034657836709113908114601623266421909460298873677983464652434242594783501180492090228769746032381691088007882741644147466998833816679815354176422417080787701399310114454494322968344805866652112827993996254505431981830678345167245446417087210246252251469901216993221691413448509107973047292663700159978303589841359790710860797251815771391386368951961874992549082881 ,</text:p>
      <text:p text:style-name="P3">a[ 225 ]= 431359146674420743877272390431099093153727587810944222348391719337937 , b[ 225 ]= 32317006071311007300714876688669951960444102669715484032130345427524655138867890893197201411522913463688717960921898019494119559150490921095088153747131214727874617556186922113201295716652404169969747413805207300137433641768955963015024641706095145633963683250427730097518330138184399874448782888015915188911964928644932578643488045934022475620410942799109041659510751451725680658714462950582292566081045859381482511764860551744595043584029664049756676179751493218044821709126043849464973431775345703221256642040918156980020604290068209415707907485000258000826725476378287532045662129287630919255364267580816223821183 ,</text:p>
      <text:p text:style-name="P3">a[ 226 ]= 431359146674431531821443358916206272483457928323010314509382835178513 , b[ 226 ]= 32317006071311007300714876688669951960444102669715484032130345427524655138867890893197201411522913463688717960921898019494119559150490921095088153622903683320615474888376649277102713997393763225729963512460139470613598896038719898891974470193190457827218307748264592675031904702088502266015029856769534963614451954355895914454682500671782970097795527351623147237102854767172347701885257140928186855998047730811609479133672266849769403831017511620105303867492015457939978839649652922331396671375984146049971290381331516958795414743955157795387583013254586542025882571567643363266843813799451224013179740715479822721193 ,</text:p>
      <text:p text:style-name="P3">a[ 227 ]= 431359146674419262772878973418112773315074457195349952149982090902549 , b[ 227 ]= 323170060713110073007148766886699519604441026697154840321303454275246551388678908931972014115229134636887179609218980194941195591504909210950881540639028714023321132249244596036977390819290845478680321818002380419296634015160384372973096021175029860414280033864519331270780821521719445767595158882713313420417719534525252003027701306351903654963263517869070127940346132505170352474273220096330240118440298342810741413911099880245586405826053835634395262237599068605308648407960292<text:soft-page-break/>34664805861248943185760857944820723827532162682119692909222541620088793770025965467515861928442394703608042990048114731473495997989753431 ,</text:p>
      <text:p text:style-name="P3">a[ 228 ]= 431359146674424025533825275985343669875447941774904796825288858090979 , b[ 228 ]= 32317006071311007300714876688669951960444102669715484032130345427524655138867890893197201411522913463688717960921898019494119559150490921095088152866111888189757248952311836184447098513733750506263165361655699280973299661219776611890531361969681195810439873247219509634217386115468196964895867863789651969281220947201775120247406299800746568540086538786603143950482815593750290489100672971072461593707474383430664984097656150523567316562297415213491109703574186225361776031150573331267235052077432439065617004783176390857058317981135475516020410144583148561247147585092213937132044260390197105701334412156481760236343 ,</text:p>
      <text:p text:style-name="P3">a[ 229 ]= 431359146674431844117488163944204551498761910563467348804865160645589 , b[ 229 ]= 32317006071311007300714876688669951960444102669715484032130345427524655138867890893197201411522913463688717960921898019494119559150490921095088154505651975168811838588692024449693141479786519618052947163198969588800023308724531521920415819422285875995327186780079396732762317672033904681235147669469608656227049568404280779083341646936970170526314776367440076029846518755939864904697889330862436881823852322610086128878050495281406944601097950153743030865836649760039775268252688899963089148931251368463514901136187847199930728658717431200372531041690188119720886365777512795102201782619119697826510053937927330249121 ,</text:p>
      <text:p text:style-name="P3">a[ 230 ]= 431359146674427537902615583260423597784427830433985377319464771515983 , b[ 230 ]= 32317006071311007300714876688669951960444102669715484032130345427524655138867890893197201411522913463688717960921898019494119559150490921095088152904335331287724498525596367877126276040642921387600796784869125794931636562755719758241878385261062411112011462866828070633547226115790411800011531691979996279805521915837366132478551101350247588776408154448981586442958459828083647119077531601140356157984544181635423766345067683745909291840482334898845971079846645927832036224454582842359204282829284683645746097771102718935665089779066756330806424294606301398170755330291835025196025490318225498971529007062209986164213 ,</text:p>
      <text:p text:style-name="P3">a[ 231 ]= 431359146674416813194651786882657292558192292421781012083519404990633 , b[ 231 ]= 32317006071311007300714876688669951960444102669715484032130345427524655138867890893197201411522913463688717960921898019494119559150490921095088153522861188240083142477857849184026539634069259337885255418034829228269931773422371681431312725213010314806723237928271201085880365432549555770993174032211381338624126344008656649612307992722312949428653462215996441067505804863300035735805858332226590474575691782420119969025777557277008534883093411736593870264618942345707000168311257280692309542690675785927025156886669381327625272047312118440646804837355887583053294207006612346194874563545657785505171029820426688659523 ,</text:p>
      <text:p text:style-name="P3">a[ 232 ]= 431359146674420022294316480177894225048126580836223798803794687876367 , b[ 232 ]= 32317006071311007300714876688669951960444102669715484032130345427524655138867890893197201411522913463688717960921898019494119559150490921095088152682525987935951851774883558830812613779303506728157562748163937251095777834970424180614834031709118947694086536143297543933828427178973383060600750796287178489639007718949112632165412929920543270241742935163741936572114528431301091617819838172961797548929530097289133300796558778738615452570289920992067824660733814831785837344956968910202719176303746297852143860890765804115422303265994013739875007419265071377865133851725564224856569706883096951209841779673165750560661 ,</text:p>
      <text:p text:style-name="P3"><text:soft-page-break/>a[ 233 ]= 431359146674424377570748571758254556379519490494383535795186512374179 , b[ 233 ]= 32317006071311007300714876688669951960444102669715484032130345427524655138867890893197201411522913463688717960921898019494119559150490921095088154640670378898899367314271936126316244349988085549615662672223248181217452786315606843310932880462814534303346150971126896070317269425515678912224859262983471365103494454571278309561947723753553042842180614619285745337315428952497771890621346830671155770883471164843785603229285812837822546656576102900613033405398794955251300760198304600947189514979676827832449590460576378632432138829804518379050949813535328772768308100117790526485035568139604605672049714486019331506333 ,</text:p>
      <text:p text:style-name="P3">a[ 234 ]= 431359146674414425529059352146743730631695583689361533908090822187561 , b[ 234 ]= 32317006071311007300714876688669951960444102669715484032130345427524655138867890893197201411522913463688717960921898019494119559150490921095088154773982257327602535756811239444705240545106760340700350946795363249226289378085769580595731053585101115989146754147642879138017751333840834699552835164940786713003133744322691364650592381583638236571843039874429464165804842308200643661055047634162202025644986554850722774812077700121300193222219869616650961846286262578626040747754681894658707417017402490330694209632072334759176471532459922586467443744765716877959925727906493476392607633885798378548283727461385839038043 ,</text:p>
      <text:p text:style-name="P3">a[ 235 ]= 431359146674419408417226124213412411847588903680490741624074744601677 , b[ 235 ]= 32317006071311007300714876688669951960444102669715484032130345427524655138867890893197201411522913463688717960921898019494119559150490921095088152685876703038735540596158916571615722869881156453535245809408200384052657919950902134450567930652138917402127146178804250893713669041381024735723858048307441997556684184397193991382313801794431548469507181720526713727743939554434033306630461171845405342534963493626263326208592199370198173616372872385197094640554699011597320615826937072057420816316135406030455682441183169197866807689755608488983404480830549343753879137298832319990515291612160149523618117938933214983211 ,</text:p>
      <text:p text:style-name="P3">a[ 236 ]= 431359146674423691634594018750603905450910200687826961064193743320839 , b[ 236 ]= 32317006071311007300714876688669951960444102669715484032130345427524655138867890893197201411522913463688717960921898019494119559150490921095088153977049090115052310038142101433854809485239391724827073651779478642892724760608236688012937924857561454724696604619493593704085086033365547914889838836272087984038962320546911497608014205686599127217952253752835056986117914049085098024111208796215805920185211542767406686926680771254778073774338824960563269116880123674523791334068631942436462642105009325308290026908999517279784076180658584731044160585484908889335594735479315577374246098272657122860773285367458899423387 ,</text:p>
      <text:p text:style-name="P3">a[ 237 ]= 431359146674431323088683389088653317463070952108049037943499369825201 , b[ 237 ]= 32317006071311007300714876688669951960444102669715484032130345427524655138867890893197201411522913463688717960921898019494119559150490921095088153648659544359090991293971669813439833943853840572743724265870510877502985413826901809462412297786913496639634808903351860108664606637895915669392873543796058312021516403706092289036479925984284665105665886581549351699650467816908374978262144743224166520527416342609183776274869922542417068906355938765690972162071812184989689293179553723606928324544772524922311996600107043990646016907605111488852119618744580994060139351830667225870879777710382713056485438384443725250773 ,</text:p>
      <text:p text:style-name="P3">a[ 238 ]= 431359146674420424685999876254400618200442456727398993150935494205197 , b[ 238 ]= <text:soft-page-break/>32317006071311007300714876688669951960444102669715484032130345427524655138867890893197201411522913463688717960921898019494119559150490921095088154142793091305436463106537187192586996152006415235985839918220393656946788622444535634518255137637882107188409197004605225579193894244220823501012540230476898227270523652854860715115201526119346142191387910190033930971372331215341640624642047395441084364516455146319281902798930194718218178320010966948293785781658822374226400332539588184318820550075556017646652817033144004299588981848624504327467560846380245337538814078831685579867695033258004675191436741146074211248553 ,</text:p>
      <text:p text:style-name="P3">a[ 239 ]= 431359146674411545388887397686294471199307694405400312017848014312213 , b[ 239 ]= 32317006071311007300714876688669951960444102669715484032130345427524655138867890893197201411522913463688717960921898019494119559150490921095088154461417598528091841104702854760236313085532654111258438805526731075419184913741285881612477799611040788201060525858541093873269667713313670976977264187557734888917679365485217516309829668193238319135888671407318392364932309527329702831581845040217905374116629965400244224731153129723556161652444272598965054519641578291002136143928621682531524080720424828431895402377355163659167807344025062799940426556546163099314646401874402083312264866277382214104703966354640968584613 ,</text:p>
      <text:p text:style-name="P3">a[ 240 ]= 431359146674417280236727876888819496063315519831282481348507957353951 , b[ 240 ]= 32317006071311007300714876688669951960444102669715484032130345427524655138867890893197201411522913463688717960921898019494119559150490921095088152453659852376261151862955313391199554873885711062041337884115460111636611778952226782228875998826893087373999483940897161216445436932489415085260185475297145213674492667686305880029617529867346941028193176958015096527639967699038346073836568598056404495352161269002922026318359257805566187267467143528604596253002358173171497412630463996675027336148050623636939390278789824199202303278999025330413842993048828502316176509160770099282847845505418318463044172322874087459377 ,</text:p>
      <text:p text:style-name="P3">a[ 241 ]= 431359146674419536751821914018497431452331475149977803055194178434913 , b[ 241 ]= 32317006071311007300714876688669951960444102669715484032130345427524655138867890893197201411522913463688717960921898019494119559150490921095088154551566055154229419105076082959792193469674790491662343128672641162754736405275056160317027149003506493571157350844975494144830104499770726532914504989608781244191831753698289791745565781704131740774540357120230858512139281560698299814413604001929917699194682439589833213852730511614621844296219568282719560123848690133484435753473388323249459187551656051640051127538615058773194065772598020098085821873815906591813223034523382945445979884072817762006866481114753786762853 ,</text:p>
      <text:p text:style-name="P3">a[ 242 ]= 431359146674419300762695814935937321946666881888115722549605960544019 , b[ 242 ]= 32317006071311007300714876688669951960444102669715484032130345427524655138867890893197201411522913463688717960921898019494119559150490921095088153878467316674606931007280509407529974323763003708034891432546672264473775575018268964253761777037156238181741390628706759656521807325485710013549317570765380521070039650265118567733476760417581625797968893124759491406026583655478710256338694425120174350790481807498591656482575799183335814966814342266449106546860443778495637571889736240996316191280360764569731858779871969918457933147359301221525095992752038202589143415362586706443543890773749964198521894351832755537811 ,</text:p>
      <text:p text:style-name="P3">a[ 243 ]= 431359146674427601734156312949274457497583252115290081828800114965529 , b[ 243 ]= 3231700607131100730071487668866995196044410266971548403213034542752465513886789089319720141152291346368871796092189801949411955915049092109508815422046116229247<text:soft-page-break/>0503414110366656389596551131669042732786071853626043405875082966409018839941111684631413853538693680034255203624067807171718806589722307172447825478909428523743159707607868995341514475304935945348354988505314962915719023404376440988589203536738037414876105614725936616333598981216319493282219754229617309246339235535869983439239707737370688199191272779723530420793223731055302716031612618540477895668895570215986094804646104647200207549472345101127310629759 ,</text:p>
      <text:p text:style-name="P3">a[ 244 ]= 431359146674424113353403426521803442507136093669191307915654746677889 , b[ 244 ]= 32317006071311007300714876688669951960444102669715484032130345427524655138867890893197201411522913463688717960921898019494119559150490921095088152765270282947828371239440361392041508946042597047181039443674505095528015233509865144886442506266999758176624326351993070713707516845613527576730236488452166697896736816742630591634976243302604258831082455970293154694630056838840003543468664798684238540585672632939831791929841103687449568633583901796427884224462659744836174659197835258831287380228918309529697615076514735624671705249592910674204561095717070555004280786080783746492714481961909634076845110287175079460861 ,</text:p>
      <text:p text:style-name="P3">a[ 245 ]= 431359146674422102615614344867574957717258569921132571718661484357337 , b[ 245 ]= 32317006071311007300714876688669951960444102669715484032130345427524655138867890893197201411522913463688717960921898019494119559150490921095088152987701009663886114033554301659622482642318975170131167983418120583784975447362310771252378317203865247889885671920269086823746822604397854162234833551649201974757707922950145838144471575983642703345437809967437659351962699192482080504343722749714294502033053585255450056772583498633054944183193674762429163599513096741561905755444856284147019752958473356302175018323690596790496827201544803857360950015095611102733534620671489508066288350271524737147103790223546876349369 ,</text:p>
      <text:p text:style-name="P3">a[ 246 ]= 431359146674417036597599816828481014797136836172099981714441410923867 , b[ 246 ]= 32317006071311007300714876688669951960444102669715484032130345427524655138867890893197201411522913463688717960921898019494119559150490921095088153701343719530494075829289914167017638727346050609555963140679043139884349732910049645111152319420944127894358521493071308920899501725339931644080179702774790304092307637508567759535775844334941702372213936280807592711002886056732679485029441408393233708015971024253750373777925217084060127994238651824040325265290089214017560681589282433074639485853139223315516495152265695885556861379084009573815337003287997758938516852046945968179277809980939647320153032857270573019051 ,</text:p>
      <text:p text:style-name="P3">a[ 247 ]= 431359146674425146620217643466024629741120599935107031556746008577857 , b[ 247 ]= 32317006071311007300714876688669951960444102669715484032130345427524655138867890893197201411522913463688717960921898019494119559150490921095088154567190230574265474971421886425721051778675819585360846962955353894484329174199274703758183473972627203620558212606273336540807621088054981286199029691974118505347844766504648456259224782823685111609782073756268933445897948827724650253746396832545790220062822946211721512396055284688227971095719933837980484758641609414356026094931687610908792259852711489735042830692048327472446092033765923133764397823899078969148360033960025115659418915591305937153002310567524287681937 ,</text:p>
      <text:p text:style-name="P3">a[ 248 ]= 431359146674410558440120086811548339825541200172825733136666102163157 , b[ 248 ]= 32317006071311007300714876688669951960444102669715484032130345427524655138867890893197201411522913463688717960921898019494119559150490921095088152567065543766630827046297870048619363662478732444908583966134248073364941365854452101562262876422442622633395281004999087638348879717855878446578770356607622282671177149113006<text:soft-page-break/>557040767535438156707849710058062912057352886840172004746712213162815811162548124246748549002738123317036370143643997778564222379225497098603926402732380660274104933834768110689029539523033792346897250000601789911773908078990737200320228182137873592913734897609917543433279542855311126988978050079 ,</text:p>
      <text:p text:style-name="P3">a[ 249 ]= 431359146674418545520626446133372796165036588878814399334644124952581 , b[ 249 ]= 32317006071311007300714876688669951960444102669715484032130345427524655138867890893197201411522913463688717960921898019494119559150490921095088153623457891277562281753534052648560016318003866650416611664424172271695951658602206392428218527956240749718434409476761733391914685962856784623591942910301236560772852067906591765636677965411551312681491976776289003478586327694972067984321932804686770921405925476856727358542372334376382262380598167329546244600349180533761681609348346993518198478943451920584361142600155261094957628463970148726422931774353896274777719754636742459908956861843623820547038018451046280638961 ,</text:p>
      <text:p text:style-name="P3">a[ 250 ]= 431359146674427426181593983888210910149233525756169629199072225089891 , b[ 250 ]= 32317006071311007300714876688669951960444102669715484032130345427524655138867890893197201411522913463688717960921898019494119559150490921095088154365916339346747449299871612242945600945948244342562732024712865538727822329019571789287629781361173834506773988305640859672862678199684602332614106618902759313889000834880146994704938882299381164466895818259240154536373612591493435383251113248844282556435148497442804629135462356209916746931183791928863430289269012811152290678633209758352002241525731624114380810351321162046303936087024713412188110270213076278085289590878829010374051999353973368192408222112656578312111 ,</text:p>
      <text:p text:style-name="P3">a[ 251 ]= 431359146674415616397679053413713144548852875246448873773561344709343 , b[ 251 ]= 32317006071311007300714876688669951960444102669715484032130345427524655138867890893197201411522913463688717960921898019494119559150490921095088153011222366463860217967580239295174993707262767350704398337580991648958524447701395606610534182348632057901305359806996320538743792255843613500866347822121703774786702293893212731850267768141778587262891739976417111351914116791189070130303336806596704312531547228590231087710601585578326356075094204260039262908612880369670124503673896594330395742509250429283337044561834581097405464191650436086745990824090527323067744447724497941827929574758594025769960437982313535702787 ,</text:p>
      <text:p text:style-name="P3">a[ 252 ]= 431359146674413541291978141170192429070961089595776115640786053302543 , b[ 252 ]= 32317006071311007300714876688669951960444102669715484032130345427524655138867890893197201411522913463688717960921898019494119559150490921095088153814738101734956637527726852917321962666121288450903848050138051506329385132130926223826999850083381995488733416945783308824338294050241889060938007159946083858424364257946889850992301340396161707597247058097303929884539511782933791744384442797771100869416286752810653010803445506665656235750441934300478103195478207412415501654413562863622429064786212853041681967661680708730288391838813373535384541519388142527430598301371762424835278188859652319172455059875321073432011 ,</text:p>
      <text:p text:style-name="P3">a[ 253 ]= 431359146674423516415528094557985767739189537819112256467685399222191 , b[ 253 ]= 323170060713110073007148766886699519604441026697154840321303454275246551388678908931972014115229134636887179609218980194941195591504909210950881537053276333490796275957156228606908100486421588795419704722012983443038291956912606669754575305370603342331857762256324182905753519777449240510061041651659118760458744680655595918008602512061165812910842144019566997470433503261205909782920086498008706420581905808340681564059318060415448739538135772681628145307771255639094700250104037<text:soft-page-break/>54247268279959464022821979446853927142008227432810966751061173404587933760015085917418521416813108300276594890994598907186059485916755561 ,</text:p>
      <text:p text:style-name="P3">a[ 254 ]= 431359146674430090971280882760612210178606025826569384220061144146643 , b[ 254 ]= 32317006071311007300714876688669951960444102669715484032130345427524655138867890893197201411522913463688717960921898019494119559150490921095088152452589943613700028549275662591182858578933387814397221906874316677896012805913324443090277185645931464080990537974006346547170764384606078624306073905328285035189340928894875022256564614864623135499637562505846291857913197040864789384335972391201898103785210879598770863126767589076319590204612655673272061822743886627876820644953012324951276390863682074086043646518928746877598582213318624293595719047692897368516349270139168024858281828942079075771134317441492997895603 ,</text:p>
      <text:p text:style-name="P3">a[ 255 ]= 431359146674416685649403897014759620920926583978528801414188116520223 , b[ 255 ]= 32317006071311007300714876688669951960444102669715484032130345427524655138867890893197201411522913463688717960921898019494119559150490921095088153723756342255334212456699352484263549413606731544447168359972269125788036594146471375374331749816428184444790430685655183985498911016207925333058971877269487327550509693189444576347911363779255767164317623828761197035739754950186985139033255234658358252647329463833638462209096078493208649286427513073124795346921028317061253688329506090858335339312260928004556533330111071419133398327450363333091576122272051318132827677473534618923755588159657752117386051116770282518571 ,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14T14:30:45.112292374</meta:creation-date>
    <dc:date>2026-06-14T16:41:00.576685319</dc:date>
    <meta:editing-duration>PT43S</meta:editing-duration>
    <meta:editing-cycles>2</meta:editing-cycles>
    <meta:generator>LibreOffice/26.2.3.2$Linux_X86_64 LibreOffice_project/d4d5ed47b6084125f28d269a5650105d54dde034</meta:generator>
    <meta:document-statistic meta:table-count="0" meta:image-count="0" meta:object-count="0" meta:page-count="50" meta:paragraph-count="259" meta:word-count="2628" meta:character-count="182247" meta:non-whitespace-character-count="179878"/>
  </office:meta>
</office:document-meta>
</file>